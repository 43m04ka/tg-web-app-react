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of="urn:oasis:names:tc:opendocument:xmlns:of:1.2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of="urn:oasis:names:tc:opendocument:xmlns:of:1.2" xmlns:manifest="urn:oasis:names:tc:opendocument:xmlns:manifest:1.0" office:version="1.2">
  <office:automatic-styles>
    <style:style style:name="u_tl" style:family="table-cell" style:parent-style-name="Default" style:display-name="u_tl">
      <style:table-cell-properties fo:border="0.06pt solid #000000" style:vertical-align="middle"/>
      <style:paragraph-properties fo:text-align="start"/>
      <style:text-properties fo:font-family="Arial"/>
    </style:style>
    <style:style style:name="u_hdr" style:family="table-cell" style:parent-style-name="Default" style:display-name="u_hdr">
      <style:table-cell-properties fo:border="0.06pt solid #000000" style:vertical-align="middle" fo:background-color="#e2efda"/>
      <style:paragraph-properties fo:text-align="center"/>
      <style:text-properties fo:font-family="Arial" fo:font-weight="bold"/>
    </style:style>
    <style:style style:name="u_num" style:family="table-cell" style:parent-style-name="Default" style:display-name="u_num">
      <style:table-cell-properties fo:border="0.06pt solid #000000" style:vertical-align="middle"/>
      <style:paragraph-properties fo:text-align="end"/>
      <style:text-properties fo:font-family="Arial"/>
    </style:style>
    <style:style style:name="u_merge" style:family="table-cell" style:parent-style-name="Default" style:display-name="u_merge">
      <style:table-cell-properties fo:border="0.06pt solid #000000" style:vertical-align="middle" fo:background-color="#e2efda"/>
      <style:paragraph-properties fo:text-align="center"/>
      <style:text-properties fo:font-family="Arial" fo:font-weight="bold"/>
    </style:style>
    <style:style style:name="u_cov" style:family="table-cell" style:parent-style-name="Default" style:display-name="u_cov">
      <style:table-cell-properties fo:border="0.06pt solid #000000" style:vertical-align="middle"/>
      <style:paragraph-properties fo:text-align="center"/>
      <style:text-properties fo:font-family="Arial"/>
    </style:style>
    <style:style style:name="b_tl" style:family="table-cell" style:parent-style-name="Default" style:display-name="b_tl">
      <style:table-cell-properties fo:border="0.06pt solid #000000" style:vertical-align="middle"/>
      <style:paragraph-properties fo:text-align="start"/>
      <style:text-properties fo:font-family="Arial"/>
    </style:style>
    <style:style style:name="b_hdr" style:family="table-cell" style:parent-style-name="Default" style:display-name="b_hdr">
      <style:table-cell-properties fo:border="0.06pt solid #000000" style:vertical-align="middle" fo:background-color="#e2efda"/>
      <style:paragraph-properties fo:text-align="center"/>
      <style:text-properties fo:font-family="Arial" fo:font-weight="bold"/>
    </style:style>
    <style:style style:name="b_num" style:family="table-cell" style:parent-style-name="Default" style:display-name="b_num">
      <style:table-cell-properties fo:border="0.06pt solid #000000" style:vertical-align="middle"/>
      <style:paragraph-properties fo:text-align="end"/>
      <style:text-properties fo:font-family="Arial"/>
    </style:style>
    <style:style style:name="b_merge" style:family="table-cell" style:parent-style-name="Default" style:display-name="b_merge">
      <style:table-cell-properties fo:border="0.06pt solid #000000" style:vertical-align="middle" fo:background-color="#e2efda"/>
      <style:paragraph-properties fo:text-align="center"/>
      <style:text-properties fo:font-family="Arial" fo:font-weight="bold"/>
    </style:style>
    <style:style style:name="b_sec" style:family="table-cell" style:parent-style-name="Default" style:display-name="b_sec">
      <style:table-cell-properties fo:border="0.06pt solid #000000" style:vertical-align="middle" fo:background-color="#e2efda"/>
      <style:paragraph-properties fo:text-align="center"/>
      <style:text-properties fo:font-family="Arial" fo:font-weight="bold"/>
    </style:style>
    <style:style style:name="b_plbl" style:family="table-cell" style:parent-style-name="Default" style:display-name="b_plbl">
      <style:table-cell-properties fo:border="0.06pt solid #000000" style:vertical-align="middle" fo:background-color="#fff2cc"/>
      <style:paragraph-properties fo:text-align="start"/>
      <style:text-properties fo:font-family="Arial" fo:font-weight="bold"/>
    </style:style>
    <style:style style:name="b_pval" style:family="table-cell" style:parent-style-name="Default" style:display-name="b_pval">
      <style:table-cell-properties fo:border="0.06pt solid #000000" style:vertical-align="middle" fo:background-color="#fce4d6"/>
      <style:paragraph-properties fo:text-align="end"/>
      <style:text-properties fo:font-family="Arial"/>
    </style:style>
    <style:style style:name="b_cov" style:family="table-cell" style:parent-style-name="Default" style:display-name="b_cov">
      <style:table-cell-properties fo:border="0.06pt solid #000000" style:vertical-align="middle"/>
      <style:paragraph-properties fo:text-align="center"/>
      <style:text-properties fo:font-family="Arial"/>
    </style:style>
  </office:automatic-styles>
  <office:body>
    <office:spreadsheet>
      <table:table table:name="Бюджет 2019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office:string-value="Торговый бюджет: 2019 финансовый год" table:number-columns-spanned="9" table:style-name="b_merge">
            <text:p>Торговый бюджет: 2019 финансовый год</text:p>
          </table:table-cell>
          <table:covered-table-cell table:style-name="b_cov"/>
          <table:covered-table-cell table:style-name="b_cov"/>
          <table:covered-table-cell table:style-name="b_cov"/>
          <table:covered-table-cell table:style-name="b_cov"/>
          <table:covered-table-cell table:style-name="b_cov"/>
          <table:covered-table-cell table:style-name="b_cov"/>
          <table:covered-table-cell table:style-name="b_cov"/>
          <table:covered-table-cell table:style-name="b_cov"/>
        </table:table-row>
        <table:table-row>
          <table:table-cell office:value-type="string" office:string-value="" table:style-name="b_tl">
            <text:p/>
          </table:table-cell>
          <table:table-cell office:value-type="string" office:string-value="Составил" table:style-name="b_tl">
            <text:p>Составил</text:p>
          </table:table-cell>
          <table:table-cell office:value-type="string" office:string-value="Иванов И.И." table:style-name="b_tl">
            <text:p>Иванов И.И.</text:p>
          </table:table-cell>
          <table:table-cell office:value-type="string" office:string-value="" table:style-name="b_tl">
            <text:p/>
          </table:table-cell>
          <table:table-cell office:value-type="string" office:string-value="" table:style-name="b_tl">
            <text:p/>
          </table:table-cell>
          <table:table-cell office:value-type="string" office:string-value="" table:style-name="b_tl">
            <text:p/>
          </table:table-cell>
          <table:table-cell office:value-type="string" office:string-value="" table:style-name="b_tl">
            <text:p/>
          </table:table-cell>
          <table:table-cell office:value-type="string" office:string-value="" table:style-name="b_tl">
            <text:p/>
          </table:table-cell>
          <table:table-cell office:value-type="string" office:string-value="" table:style-name="b_tl">
            <text:p/>
          </table:table-cell>
        </table:table-row>
        <table:table-row>
          <table:table-cell office:value-type="string" office:string-value="" table:style-name="b_tl">
            <text:p/>
          </table:table-cell>
          <table:table-cell office:value-type="string" office:string-value="Дата" table:style-name="b_tl">
            <text:p>Дата</text:p>
          </table:table-cell>
          <table:table-cell office:value-type="date" office:date-value="2026-05-11" table:formula="of:=TODAY()" table:style-name="b_tl">
            <text:p>11.05.2026</text:p>
          </table:table-cell>
          <table:table-cell office:value-type="string" office:string-value="" table:style-name="b_tl">
            <text:p/>
          </table:table-cell>
          <table:table-cell office:value-type="string" office:string-value="" table:style-name="b_tl">
            <text:p/>
          </table:table-cell>
          <table:table-cell office:value-type="string" office:string-value="" table:style-name="b_tl">
            <text:p/>
          </table:table-cell>
          <table:table-cell office:value-type="string" office:string-value="" table:style-name="b_tl">
            <text:p/>
          </table:table-cell>
          <table:table-cell office:value-type="string" office:string-value="" table:style-name="b_tl">
            <text:p/>
          </table:table-cell>
          <table:table-cell office:value-type="string" office:string-value="" table:style-name="b_tl">
            <text:p/>
          </table:table-cell>
        </table:table-row>
        <table:table-row/>
        <table:table-row>
          <table:table-cell office:value-type="string" office:string-value="" table:style-name="b_tl">
            <text:p/>
          </table:table-cell>
          <table:table-cell office:value-type="string" office:string-value="Исходные данные" table:style-name="b_hdr">
            <text:p>Исходные данные</text:p>
          </table:table-cell>
          <table:table-cell office:value-type="string" office:string-value="" table:style-name="b_hdr">
            <text:p/>
          </table:table-cell>
          <table:table-cell office:value-type="string" office:string-value="" table:style-name="b_hdr">
            <text:p/>
          </table:table-cell>
          <table:table-cell office:value-type="string" office:string-value="" table:style-name="b_hdr">
            <text:p/>
          </table:table-cell>
          <table:table-cell office:value-type="string" office:string-value="" table:style-name="b_hdr">
            <text:p/>
          </table:table-cell>
          <table:table-cell office:value-type="string" office:string-value="" table:style-name="b_hdr">
            <text:p/>
          </table:table-cell>
          <table:table-cell office:value-type="string" office:string-value="" table:style-name="b_hdr">
            <text:p/>
          </table:table-cell>
          <table:table-cell office:value-type="string" office:string-value="" table:style-name="b_hdr">
            <text:p/>
          </table:table-cell>
        </table:table-row>
        <table:table-row>
          <table:table-cell office:value-type="string" office:string-value="" table:style-name="b_tl">
            <text:p/>
          </table:table-cell>
          <table:table-cell office:value-type="string" office:string-value="Рост объёма продаж" table:style-name="b_tl">
            <text:p>Рост объёма продаж</text:p>
          </table:table-cell>
          <table:table-cell office:value-type="float" office:value="0.15" table:style-name="b_num">
            <text:p>0,15</text:p>
          </table:table-cell>
          <table:table-cell office:value-type="string" office:string-value="" table:style-name="b_tl">
            <text:p/>
          </table:table-cell>
          <table:table-cell office:value-type="string" office:string-value="" table:style-name="b_tl">
            <text:p/>
          </table:table-cell>
          <table:table-cell office:value-type="string" office:string-value="" table:style-name="b_tl">
            <text:p/>
          </table:table-cell>
          <table:table-cell office:value-type="string" office:string-value="" table:style-name="b_tl">
            <text:p/>
          </table:table-cell>
          <table:table-cell office:value-type="string" office:string-value="" table:style-name="b_tl">
            <text:p/>
          </table:table-cell>
          <table:table-cell office:value-type="string" office:string-value="" table:style-name="b_tl">
            <text:p/>
          </table:table-cell>
        </table:table-row>
        <table:table-row>
          <table:table-cell office:value-type="string" office:string-value="" table:style-name="b_tl">
            <text:p/>
          </table:table-cell>
          <table:table-cell office:value-type="string" office:string-value="Удорожание товаров" table:style-name="b_tl">
            <text:p>Удорожание товаров</text:p>
          </table:table-cell>
          <table:table-cell office:value-type="float" office:value="0.12" table:style-name="b_num">
            <text:p>0,12</text:p>
          </table:table-cell>
          <table:table-cell office:value-type="string" office:string-value="" table:style-name="b_tl">
            <text:p/>
          </table:table-cell>
          <table:table-cell office:value-type="string" office:string-value="" table:style-name="b_tl">
            <text:p/>
          </table:table-cell>
          <table:table-cell office:value-type="string" office:string-value="" table:style-name="b_tl">
            <text:p/>
          </table:table-cell>
          <table:table-cell office:value-type="string" office:string-value="" table:style-name="b_tl">
            <text:p/>
          </table:table-cell>
          <table:table-cell office:value-type="string" office:string-value="" table:style-name="b_tl">
            <text:p/>
          </table:table-cell>
          <table:table-cell office:value-type="string" office:string-value="" table:style-name="b_tl">
            <text:p/>
          </table:table-cell>
        </table:table-row>
        <table:table-row/>
        <table:table-row>
          <table:table-cell office:value-type="string" office:string-value="" table:style-name="b_tl">
            <text:p/>
          </table:table-cell>
          <table:table-cell office:value-type="string" office:string-value="" table:style-name="b_tl">
            <text:p/>
          </table:table-cell>
          <table:table-cell office:value-type="string" office:string-value="" table:style-name="b_hdr">
            <text:p/>
          </table:table-cell>
          <table:table-cell office:value-type="string" office:string-value="Март" table:style-name="b_hdr">
            <text:p>Март</text:p>
          </table:table-cell>
          <table:table-cell office:value-type="string" office:string-value="Апрель" table:style-name="b_hdr">
            <text:p>Апрель</text:p>
          </table:table-cell>
          <table:table-cell office:value-type="string" office:string-value="Май" table:style-name="b_hdr">
            <text:p>Май</text:p>
          </table:table-cell>
          <table:table-cell office:value-type="string" office:string-value="Июнь" table:style-name="b_hdr">
            <text:p>Июнь</text:p>
          </table:table-cell>
          <table:table-cell office:value-type="string" office:string-value="Июль" table:style-name="b_hdr">
            <text:p>Июль</text:p>
          </table:table-cell>
          <table:table-cell office:value-type="string" office:string-value="Август" table:style-name="b_hdr">
            <text:p>Август</text:p>
          </table:table-cell>
          <table:table-cell office:value-type="string" office:string-value="Всего" table:style-name="b_hdr">
            <text:p>Всего</text:p>
          </table:table-cell>
        </table:table-row>
        <table:table-row>
          <table:table-cell office:value-type="string" office:string-value="" table:style-name="b_tl">
            <text:p/>
          </table:table-cell>
          <table:table-cell office:value-type="string" office:string-value="Приход" table:style-name="b_tl">
            <text:p>Приход</text:p>
          </table:table-cell>
          <table:table-cell office:value-type="string" office:string-value="" table:style-name="b_tl">
            <text:p/>
          </table:table-cell>
          <table:table-cell office:value-type="float" office:value="32550.0" table:style-name="b_num">
            <text:p>32550,0</text:p>
          </table:table-cell>
          <table:table-cell office:value-type="float" office:value="33255.0" table:style-name="b_num">
            <text:p>33255,0</text:p>
          </table:table-cell>
          <table:table-cell office:value-type="float" office:value="33960.0" table:style-name="b_num">
            <text:p>33960,0</text:p>
          </table:table-cell>
          <table:table-cell office:value-type="float" office:value="34665.0" table:style-name="b_num">
            <text:p>34665,0</text:p>
          </table:table-cell>
          <table:table-cell office:value-type="float" office:value="35370.0" table:style-name="b_num">
            <text:p>35370,0</text:p>
          </table:table-cell>
          <table:table-cell office:value-type="float" office:value="32982.0" table:style-name="b_num">
            <text:p>32982,0</text:p>
          </table:table-cell>
          <table:table-cell office:value-type="float" office:value="202782.0" table:formula="of:=SUM(C10:H10)" table:style-name="b_num">
            <text:p>202782</text:p>
          </table:table-cell>
        </table:table-row>
        <table:table-row>
          <table:table-cell office:value-type="string" office:string-value="" table:style-name="b_tl">
            <text:p/>
          </table:table-cell>
          <table:table-cell office:value-type="string" office:string-value="Затраты на товар" table:style-name="b_tl">
            <text:p>Затраты на товар</text:p>
          </table:table-cell>
          <table:table-cell office:value-type="string" office:string-value="" table:style-name="b_tl">
            <text:p/>
          </table:table-cell>
          <table:table-cell office:value-type="float" office:value="19316.0" table:style-name="b_num">
            <text:p>19316,0</text:p>
          </table:table-cell>
          <table:table-cell office:value-type="float" office:value="19455.0" table:style-name="b_num">
            <text:p>19455,0</text:p>
          </table:table-cell>
          <table:table-cell office:value-type="float" office:value="19680.0" table:style-name="b_num">
            <text:p>19680,0</text:p>
          </table:table-cell>
          <table:table-cell office:value-type="float" office:value="19905.0" table:style-name="b_num">
            <text:p>19905,0</text:p>
          </table:table-cell>
          <table:table-cell office:value-type="float" office:value="20130.0" table:style-name="b_num">
            <text:p>20130,0</text:p>
          </table:table-cell>
          <table:table-cell office:value-type="float" office:value="20640.0" table:style-name="b_num">
            <text:p>20640,0</text:p>
          </table:table-cell>
          <table:table-cell office:value-type="float" office:value="119126.0" table:formula="of:=SUM(C11:H11)" table:style-name="b_num">
            <text:p>119126</text:p>
          </table:table-cell>
        </table:table-row>
        <table:table-row>
          <table:table-cell office:value-type="string" office:string-value="" table:style-name="b_tl">
            <text:p/>
          </table:table-cell>
          <table:table-cell office:value-type="string" office:string-value="Полная выручка" table:style-name="b_tl">
            <text:p>Полная выручка</text:p>
          </table:table-cell>
          <table:table-cell office:value-type="string" office:string-value="" table:style-name="b_tl">
            <text:p/>
          </table:table-cell>
          <table:table-cell office:value-type="float" office:value="13234.0" table:formula="of:=C10-C11" table:style-name="b_num">
            <text:p>13234,0</text:p>
          </table:table-cell>
          <table:table-cell office:value-type="float" office:value="13800.0" table:formula="of:=D10-D11" table:style-name="b_num">
            <text:p>13800,0</text:p>
          </table:table-cell>
          <table:table-cell office:value-type="float" office:value="14280.0" table:formula="of:=E10-E11" table:style-name="b_num">
            <text:p>14280,0</text:p>
          </table:table-cell>
          <table:table-cell office:value-type="float" office:value="14760.0" table:formula="of:=F10-F11" table:style-name="b_num">
            <text:p>14760,0</text:p>
          </table:table-cell>
          <table:table-cell office:value-type="float" office:value="15240.0" table:formula="of:=G10-G11" table:style-name="b_num">
            <text:p>15240,0</text:p>
          </table:table-cell>
          <table:table-cell office:value-type="float" office:value="12342.0" table:formula="of:=H10-H11" table:style-name="b_num">
            <text:p>12342,0</text:p>
          </table:table-cell>
          <table:table-cell office:value-type="float" office:value="83656.0" table:formula="of:=SUM(C12:H12)" table:style-name="b_num">
            <text:p>83656</text:p>
          </table:table-cell>
        </table:table-row>
        <table:table-row/>
        <table:table-row>
          <table:table-cell office:value-type="string" office:string-value="Статьи расходов" table:number-columns-spanned="9" table:style-name="b_sec">
            <text:p>Статьи расходов</text:p>
          </table:table-cell>
          <table:covered-table-cell table:style-name="b_cov"/>
          <table:covered-table-cell table:style-name="b_cov"/>
          <table:covered-table-cell table:style-name="b_cov"/>
          <table:covered-table-cell table:style-name="b_cov"/>
          <table:covered-table-cell table:style-name="b_cov"/>
          <table:covered-table-cell table:style-name="b_cov"/>
          <table:covered-table-cell table:style-name="b_cov"/>
          <table:covered-table-cell table:style-name="b_cov"/>
        </table:table-row>
        <table:table-row>
          <table:table-cell office:value-type="string" office:string-value="" table:style-name="b_tl">
            <text:p/>
          </table:table-cell>
          <table:table-cell office:value-type="string" office:string-value="Реклама" table:style-name="b_tl">
            <text:p>Реклама</text:p>
          </table:table-cell>
          <table:table-cell office:value-type="string" office:string-value="" table:style-name="b_tl">
            <text:p/>
          </table:table-cell>
          <table:table-cell office:value-type="float" office:value="4000.0" table:style-name="b_num">
            <text:p>4000,0</text:p>
          </table:table-cell>
          <table:table-cell office:value-type="float" office:value="4000.0" table:style-name="b_num">
            <text:p>4000,0</text:p>
          </table:table-cell>
          <table:table-cell office:value-type="float" office:value="4000.0" table:style-name="b_num">
            <text:p>4000,0</text:p>
          </table:table-cell>
          <table:table-cell office:value-type="float" office:value="4000.0" table:style-name="b_num">
            <text:p>4000,0</text:p>
          </table:table-cell>
          <table:table-cell office:value-type="float" office:value="4000.0" table:style-name="b_num">
            <text:p>4000,0</text:p>
          </table:table-cell>
          <table:table-cell office:value-type="float" office:value="4000.0" table:style-name="b_num">
            <text:p>4000,0</text:p>
          </table:table-cell>
          <table:table-cell office:value-type="float" office:value="24000.0" table:formula="of:=SUM(C15:H15)" table:style-name="b_num">
            <text:p>24000,0</text:p>
          </table:table-cell>
        </table:table-row>
        <table:table-row>
          <table:table-cell office:value-type="string" office:string-value="" table:style-name="b_tl">
            <text:p/>
          </table:table-cell>
          <table:table-cell office:value-type="string" office:string-value="Аренда помещений" table:style-name="b_tl">
            <text:p>Аренда помещений</text:p>
          </table:table-cell>
          <table:table-cell office:value-type="string" office:string-value="" table:style-name="b_tl">
            <text:p/>
          </table:table-cell>
          <table:table-cell office:value-type="float" office:value="500.0" table:style-name="b_num">
            <text:p>500,0</text:p>
          </table:table-cell>
          <table:table-cell office:value-type="float" office:value="500.0" table:style-name="b_num">
            <text:p>500,0</text:p>
          </table:table-cell>
          <table:table-cell office:value-type="float" office:value="500.0" table:style-name="b_num">
            <text:p>500,0</text:p>
          </table:table-cell>
          <table:table-cell office:value-type="float" office:value="500.0" table:style-name="b_num">
            <text:p>500,0</text:p>
          </table:table-cell>
          <table:table-cell office:value-type="float" office:value="500.0" table:style-name="b_num">
            <text:p>500,0</text:p>
          </table:table-cell>
          <table:table-cell office:value-type="float" office:value="500.0" table:style-name="b_num">
            <text:p>500,0</text:p>
          </table:table-cell>
          <table:table-cell office:value-type="float" office:value="3000.0" table:formula="of:=SUM(C16:H16)" table:style-name="b_num">
            <text:p>3000,0</text:p>
          </table:table-cell>
        </table:table-row>
        <table:table-row>
          <table:table-cell office:value-type="string" office:string-value="" table:style-name="b_tl">
            <text:p/>
          </table:table-cell>
          <table:table-cell office:value-type="string" office:string-value="Налоги и выплаты" table:style-name="b_tl">
            <text:p>Налоги и выплаты</text:p>
          </table:table-cell>
          <table:table-cell office:value-type="string" office:string-value="" table:style-name="b_tl">
            <text:p/>
          </table:table-cell>
          <table:table-cell office:value-type="float" office:value="240.0" table:style-name="b_num">
            <text:p>240,0</text:p>
          </table:table-cell>
          <table:table-cell office:value-type="float" office:value="241.0" table:style-name="b_num">
            <text:p>241,0</text:p>
          </table:table-cell>
          <table:table-cell office:value-type="float" office:value="242.0" table:style-name="b_num">
            <text:p>242,0</text:p>
          </table:table-cell>
          <table:table-cell office:value-type="float" office:value="243.0" table:style-name="b_num">
            <text:p>243,0</text:p>
          </table:table-cell>
          <table:table-cell office:value-type="float" office:value="244.0" table:style-name="b_num">
            <text:p>244,0</text:p>
          </table:table-cell>
          <table:table-cell office:value-type="float" office:value="245.0" table:style-name="b_num">
            <text:p>245,0</text:p>
          </table:table-cell>
          <table:table-cell office:value-type="float" office:value="1455.0" table:formula="of:=SUM(C17:H17)" table:style-name="b_num">
            <text:p>1455,0</text:p>
          </table:table-cell>
        </table:table-row>
        <table:table-row>
          <table:table-cell office:value-type="string" office:string-value="" table:style-name="b_tl">
            <text:p/>
          </table:table-cell>
          <table:table-cell office:value-type="string" office:string-value="Проценты по кредитам" table:style-name="b_tl">
            <text:p>Проценты по кредитам</text:p>
          </table:table-cell>
          <table:table-cell office:value-type="string" office:string-value="" table:style-name="b_tl">
            <text:p/>
          </table:table-cell>
          <table:table-cell office:value-type="float" office:value="800.0" table:style-name="b_num">
            <text:p>800,0</text:p>
          </table:table-cell>
          <table:table-cell office:value-type="float" office:value="807.0" table:style-name="b_num">
            <text:p>807,0</text:p>
          </table:table-cell>
          <table:table-cell office:value-type="float" office:value="814.0" table:style-name="b_num">
            <text:p>814,0</text:p>
          </table:table-cell>
          <table:table-cell office:value-type="float" office:value="821.0" table:style-name="b_num">
            <text:p>821,0</text:p>
          </table:table-cell>
          <table:table-cell office:value-type="float" office:value="828.0" table:style-name="b_num">
            <text:p>828,0</text:p>
          </table:table-cell>
          <table:table-cell office:value-type="float" office:value="835.0" table:style-name="b_num">
            <text:p>835,0</text:p>
          </table:table-cell>
          <table:table-cell office:value-type="float" office:value="4905.0" table:formula="of:=SUM(C18:H18)" table:style-name="b_num">
            <text:p>4905,0</text:p>
          </table:table-cell>
        </table:table-row>
        <table:table-row>
          <table:table-cell office:value-type="string" office:string-value="" table:style-name="b_tl">
            <text:p/>
          </table:table-cell>
          <table:table-cell office:value-type="string" office:string-value="Расходы всего" table:style-name="b_tl">
            <text:p>Расходы всего</text:p>
          </table:table-cell>
          <table:table-cell office:value-type="string" office:string-value="" table:style-name="b_tl">
            <text:p/>
          </table:table-cell>
          <table:table-cell office:value-type="float" office:value="0.0" table:formula="of:=SUM(C15:C18)" table:style-name="b_num">
            <text:p>0,0</text:p>
          </table:table-cell>
          <table:table-cell office:value-type="float" office:value="0.0" table:formula="of:=SUM(D15:D18)" table:style-name="b_num">
            <text:p>0,0</text:p>
          </table:table-cell>
          <table:table-cell office:value-type="float" office:value="0.0" table:formula="of:=SUM(E15:E18)" table:style-name="b_num">
            <text:p>0,0</text:p>
          </table:table-cell>
          <table:table-cell office:value-type="float" office:value="0.0" table:formula="of:=SUM(F15:F18)" table:style-name="b_num">
            <text:p>0,0</text:p>
          </table:table-cell>
          <table:table-cell office:value-type="float" office:value="0.0" table:formula="of:=SUM(G15:G18)" table:style-name="b_num">
            <text:p>0,0</text:p>
          </table:table-cell>
          <table:table-cell office:value-type="float" office:value="0.0" table:formula="of:=SUM(H15:H18)" table:style-name="b_num">
            <text:p>0,0</text:p>
          </table:table-cell>
          <table:table-cell office:value-type="float" office:value="0.0" table:formula="of:=SUM(C19:H19)" table:style-name="b_num">
            <text:p>0,0</text:p>
          </table:table-cell>
        </table:table-row>
        <table:table-row>
          <table:table-cell office:value-type="string" office:string-value="" table:style-name="b_tl">
            <text:p/>
          </table:table-cell>
          <table:table-cell office:value-type="string" office:string-value="Прибыль" table:style-name="b_plbl">
            <text:p>Прибыль</text:p>
          </table:table-cell>
          <table:table-cell office:value-type="string" office:string-value="" table:style-name="b_plbl">
            <text:p/>
          </table:table-cell>
          <table:table-cell office:value-type="float" office:value="0.0" table:formula="of:=C12-C19" table:style-name="b_pval">
            <text:p>0,0</text:p>
          </table:table-cell>
          <table:table-cell office:value-type="float" office:value="0.0" table:formula="of:=D12-D19" table:style-name="b_pval">
            <text:p>0,0</text:p>
          </table:table-cell>
          <table:table-cell office:value-type="float" office:value="0.0" table:formula="of:=E12-E19" table:style-name="b_pval">
            <text:p>0,0</text:p>
          </table:table-cell>
          <table:table-cell office:value-type="float" office:value="0.0" table:formula="of:=F12-F19" table:style-name="b_pval">
            <text:p>0,0</text:p>
          </table:table-cell>
          <table:table-cell office:value-type="float" office:value="0.0" table:formula="of:=G12-G19" table:style-name="b_pval">
            <text:p>0,0</text:p>
          </table:table-cell>
          <table:table-cell office:value-type="float" office:value="0.0" table:formula="of:=H12-H19" table:style-name="b_pval">
            <text:p>0,0</text:p>
          </table:table-cell>
          <table:table-cell office:value-type="float" office:value="0.0" table:formula="of:=I12-I19" table:style-name="b_pval">
            <text:p>0,0</text:p>
          </table:table-cell>
        </table:table-row>
      </table:table>
      <table:table table:name="Расходы фирмы">
        <table:table-column/>
        <table:table-column/>
        <table:table-column/>
        <table:table-column/>
        <table:table-column/>
        <table:table-row>
          <table:table-cell office:value-type="string" office:string-value="Расходы фирмы за второе полугодие 2019 года" table:number-columns-spanned="5" table:style-name="u_merge">
            <text:p>Расходы фирмы за второе полугодие 2019 года</text:p>
          </table:table-cell>
          <table:covered-table-cell table:style-name="u_cov"/>
          <table:covered-table-cell table:style-name="u_cov"/>
          <table:covered-table-cell table:style-name="u_cov"/>
          <table:covered-table-cell table:style-name="u_cov"/>
        </table:table-row>
        <table:table-row>
          <table:table-cell office:value-type="string" office:string-value="" table:style-name="u_tl">
            <text:p/>
          </table:table-cell>
          <table:table-cell office:value-type="string" office:string-value="" table:style-name="u_tl">
            <text:p/>
          </table:table-cell>
          <table:table-cell office:value-type="string" office:string-value="" table:style-name="u_tl">
            <text:p/>
          </table:table-cell>
          <table:table-cell office:value-type="string" office:string-value="" table:style-name="u_tl">
            <text:p/>
          </table:table-cell>
          <table:table-cell office:value-type="string" office:string-value="" table:style-name="u_tl">
            <text:p/>
          </table:table-cell>
        </table:table-row>
        <table:table-row>
          <table:table-cell office:value-type="string" office:string-value="Месяц" table:style-name="u_hdr">
            <text:p>Месяц</text:p>
          </table:table-cell>
          <table:table-cell office:value-type="string" office:string-value="Аренда" table:style-name="u_hdr">
            <text:p>Аренда</text:p>
          </table:table-cell>
          <table:table-cell office:value-type="string" office:string-value="Заработная плата" table:style-name="u_hdr">
            <text:p>Заработная плата</text:p>
          </table:table-cell>
          <table:table-cell office:value-type="string" office:string-value="Запчасти" table:style-name="u_hdr">
            <text:p>Запчасти</text:p>
          </table:table-cell>
          <table:table-cell office:value-type="string" office:string-value="Общие расходы" table:style-name="u_hdr">
            <text:p>Общие расходы</text:p>
          </table:table-cell>
        </table:table-row>
        <table:table-row>
          <table:table-cell office:value-type="string" office:string-value="" table:style-name="u_tl">
            <text:p/>
          </table:table-cell>
          <table:table-cell office:value-type="string" office:string-value="" table:style-name="u_tl">
            <text:p/>
          </table:table-cell>
          <table:table-cell office:value-type="string" office:string-value="" table:style-name="u_tl">
            <text:p/>
          </table:table-cell>
          <table:table-cell office:value-type="string" office:string-value="" table:style-name="u_tl">
            <text:p/>
          </table:table-cell>
          <table:table-cell office:value-type="string" office:string-value="" table:style-name="u_tl">
            <text:p/>
          </table:table-cell>
        </table:table-row>
        <table:table-row>
          <table:table-cell office:value-type="string" office:string-value="Июль" table:style-name="u_tl">
            <text:p>Июль</text:p>
          </table:table-cell>
          <table:table-cell office:value-type="float" office:value="35000.0" table:style-name="u_num">
            <text:p>35000,0</text:p>
          </table:table-cell>
          <table:table-cell office:value-type="float" office:value="8400.0" table:style-name="u_num">
            <text:p>8400,0</text:p>
          </table:table-cell>
          <table:table-cell office:value-type="float" office:value="28000.0" table:style-name="u_num">
            <text:p>28000,0</text:p>
          </table:table-cell>
          <table:table-cell office:value-type="float" office:value="71400.0" table:formula="of:=B5+C5+D5" table:style-name="u_num">
            <text:p>71400,0</text:p>
          </table:table-cell>
        </table:table-row>
        <table:table-row>
          <table:table-cell office:value-type="string" office:string-value="Август" table:style-name="u_tl">
            <text:p>Август</text:p>
          </table:table-cell>
          <table:table-cell office:value-type="float" office:value="35000.0" table:style-name="u_num">
            <text:p>35000,0</text:p>
          </table:table-cell>
          <table:table-cell office:value-type="float" office:value="8400.0" table:style-name="u_num">
            <text:p>8400,0</text:p>
          </table:table-cell>
          <table:table-cell office:value-type="float" office:value="31500.0" table:style-name="u_num">
            <text:p>31500,0</text:p>
          </table:table-cell>
          <table:table-cell office:value-type="float" office:value="74900.0" table:formula="of:=B6+C6+D6" table:style-name="u_num">
            <text:p>74900,0</text:p>
          </table:table-cell>
        </table:table-row>
        <table:table-row>
          <table:table-cell office:value-type="string" office:string-value="Сентябрь" table:style-name="u_tl">
            <text:p>Сентябрь</text:p>
          </table:table-cell>
          <table:table-cell office:value-type="float" office:value="35000.0" table:style-name="u_num">
            <text:p>35000,0</text:p>
          </table:table-cell>
          <table:table-cell office:value-type="float" office:value="9100.0" table:style-name="u_num">
            <text:p>9100,0</text:p>
          </table:table-cell>
          <table:table-cell office:value-type="float" office:value="31500.0" table:style-name="u_num">
            <text:p>31500,0</text:p>
          </table:table-cell>
          <table:table-cell office:value-type="float" office:value="75600.0" table:formula="of:=B7+C7+D7" table:style-name="u_num">
            <text:p>75600,0</text:p>
          </table:table-cell>
        </table:table-row>
        <table:table-row>
          <table:table-cell office:value-type="string" office:string-value="Октябрь" table:style-name="u_tl">
            <text:p>Октябрь</text:p>
          </table:table-cell>
          <table:table-cell office:value-type="float" office:value="42000.0" table:style-name="u_num">
            <text:p>42000,0</text:p>
          </table:table-cell>
          <table:table-cell office:value-type="float" office:value="9100.0" table:style-name="u_num">
            <text:p>9100,0</text:p>
          </table:table-cell>
          <table:table-cell office:value-type="float" office:value="31500.0" table:style-name="u_num">
            <text:p>31500,0</text:p>
          </table:table-cell>
          <table:table-cell office:value-type="float" office:value="82600.0" table:formula="of:=B8+C8+D8" table:style-name="u_num">
            <text:p>82600,0</text:p>
          </table:table-cell>
        </table:table-row>
        <table:table-row>
          <table:table-cell office:value-type="string" office:string-value="Ноябрь" table:style-name="u_tl">
            <text:p>Ноябрь</text:p>
          </table:table-cell>
          <table:table-cell office:value-type="float" office:value="42000.0" table:style-name="u_num">
            <text:p>42000,0</text:p>
          </table:table-cell>
          <table:table-cell office:value-type="float" office:value="9100.0" table:style-name="u_num">
            <text:p>9100,0</text:p>
          </table:table-cell>
          <table:table-cell office:value-type="float" office:value="35000.0" table:style-name="u_num">
            <text:p>35000,0</text:p>
          </table:table-cell>
          <table:table-cell office:value-type="float" office:value="86100.0" table:formula="of:=B9+C9+D9" table:style-name="u_num">
            <text:p>86100,0</text:p>
          </table:table-cell>
        </table:table-row>
        <table:table-row>
          <table:table-cell office:value-type="string" office:string-value="Декабрь" table:style-name="u_tl">
            <text:p>Декабрь</text:p>
          </table:table-cell>
          <table:table-cell office:value-type="float" office:value="42000.0" table:style-name="u_num">
            <text:p>42000,0</text:p>
          </table:table-cell>
          <table:table-cell office:value-type="float" office:value="9800.0" table:style-name="u_num">
            <text:p>9800,0</text:p>
          </table:table-cell>
          <table:table-cell office:value-type="float" office:value="38500.0" table:style-name="u_num">
            <text:p>38500,0</text:p>
          </table:table-cell>
          <table:table-cell office:value-type="float" office:value="90300.0" table:formula="of:=B10+C10+D10" table:style-name="u_num">
            <text:p>90300,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of="urn:oasis:names:tc:opendocument:xmlns:of:1.2" xmlns:manifest="urn:oasis:names:tc:opendocument:xmlns:manifest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of="urn:oasis:names:tc:opendocument:xmlns:of:1.2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