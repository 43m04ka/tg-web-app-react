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office:version="1.2">
  <office:automatic-styles>
    <style:style style:name="u_tl" style:family="table-cell" style:parent-style-name="Default" style:display-name="u_tl">
      <style:table-cell-properties fo:border="0.06pt solid #000000" style:vertical-align="middle"/>
      <style:paragraph-properties fo:text-align="start"/>
      <style:text-properties fo:font-family="Arial"/>
    </style:style>
    <style:style style:name="u_hdr" style:family="table-cell" style:parent-style-name="Default" style:display-name="u_hdr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u_num" style:family="table-cell" style:parent-style-name="Default" style:display-name="u_num">
      <style:table-cell-properties fo:border="0.06pt solid #000000" style:vertical-align="middle"/>
      <style:paragraph-properties fo:text-align="end"/>
      <style:text-properties fo:font-family="Arial"/>
    </style:style>
    <style:style style:name="u_merge" style:family="table-cell" style:parent-style-name="Default" style:display-name="u_merge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u_cov" style:family="table-cell" style:parent-style-name="Default" style:display-name="u_cov">
      <style:table-cell-properties fo:border="0.06pt solid #000000" style:vertical-align="middle"/>
      <style:paragraph-properties fo:text-align="center"/>
      <style:text-properties fo:font-family="Arial"/>
    </style:style>
    <style:style style:name="b_tl" style:family="table-cell" style:parent-style-name="Default" style:display-name="b_tl">
      <style:table-cell-properties fo:border="0.06pt solid #000000" style:vertical-align="middle"/>
      <style:paragraph-properties fo:text-align="start"/>
      <style:text-properties fo:font-family="Arial"/>
    </style:style>
    <style:style style:name="b_hdr" style:family="table-cell" style:parent-style-name="Default" style:display-name="b_hdr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b_num" style:family="table-cell" style:parent-style-name="Default" style:display-name="b_num">
      <style:table-cell-properties fo:border="0.06pt solid #000000" style:vertical-align="middle"/>
      <style:paragraph-properties fo:text-align="end"/>
      <style:text-properties fo:font-family="Arial"/>
    </style:style>
    <style:style style:name="b_merge" style:family="table-cell" style:parent-style-name="Default" style:display-name="b_merge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b_sec" style:family="table-cell" style:parent-style-name="Default" style:display-name="b_sec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b_plbl" style:family="table-cell" style:parent-style-name="Default" style:display-name="b_plbl">
      <style:table-cell-properties fo:border="0.06pt solid #000000" style:vertical-align="middle" fo:background-color="#fff2cc"/>
      <style:paragraph-properties fo:text-align="start"/>
      <style:text-properties fo:font-family="Arial" fo:font-weight="bold"/>
    </style:style>
    <style:style style:name="b_pval" style:family="table-cell" style:parent-style-name="Default" style:display-name="b_pval">
      <style:table-cell-properties fo:border="0.06pt solid #000000" style:vertical-align="middle" fo:background-color="#fce4d6"/>
      <style:paragraph-properties fo:text-align="end"/>
      <style:text-properties fo:font-family="Arial"/>
    </style:style>
    <style:style style:name="b_cov" style:family="table-cell" style:parent-style-name="Default" style:display-name="b_cov">
      <style:table-cell-properties fo:border="0.06pt solid #000000" style:vertical-align="middle"/>
      <style:paragraph-properties fo:text-align="center"/>
      <style:text-properties fo:font-family="Arial"/>
    </style:style>
  </office:automatic-styles>
  <office:body>
    <office:spreadsheet>
      <table:table table:name="Бюджет 20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office:string-value="Торговый бюджет: 2019 финансовый год" table:number-columns-spanned="9" table:style-name="b_merge">
            <text:p>Торговый бюджет: 2019 финансовый год</text:p>
          </table:table-cell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Составил" table:style-name="b_tl">
            <text:p>Составил</text:p>
          </table:table-cell>
          <table:table-cell office:value-type="string" office:string-value="Иванов И.И." table:style-name="b_tl">
            <text:p>Иванов И.И.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Дата" table:style-name="b_tl">
            <text:p>Дата</text:p>
          </table:table-cell>
          <table:table-cell office:value-type="date" office:date-value="2026-05-11" table:formula="of:=TODAY()" table:style-name="b_tl">
            <text:p>11.05.2026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Исходные данные" table:style-name="b_hdr">
            <text:p>Исходные данные</text:p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Рост объёма продаж" table:style-name="b_tl">
            <text:p>Рост объёма продаж</text:p>
          </table:table-cell>
          <table:table-cell office:value-type="float" office:value="0.15" table:style-name="b_num">
            <text:p>0,15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Удорожание товаров" table:style-name="b_tl">
            <text:p>Удорожание товаров</text:p>
          </table:table-cell>
          <table:table-cell office:value-type="float" office:value="0.12" table:style-name="b_num">
            <text:p>0,12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Март" table:style-name="b_hdr">
            <text:p>Март</text:p>
          </table:table-cell>
          <table:table-cell office:value-type="string" office:string-value="Апрель" table:style-name="b_hdr">
            <text:p>Апрель</text:p>
          </table:table-cell>
          <table:table-cell office:value-type="string" office:string-value="Май" table:style-name="b_hdr">
            <text:p>Май</text:p>
          </table:table-cell>
          <table:table-cell office:value-type="string" office:string-value="Июнь" table:style-name="b_hdr">
            <text:p>Июнь</text:p>
          </table:table-cell>
          <table:table-cell office:value-type="string" office:string-value="Июль" table:style-name="b_hdr">
            <text:p>Июль</text:p>
          </table:table-cell>
          <table:table-cell office:value-type="string" office:string-value="Август" table:style-name="b_hdr">
            <text:p>Август</text:p>
          </table:table-cell>
          <table:table-cell office:value-type="string" office:string-value="Всего" table:style-name="b_hdr">
            <text:p>Всего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риход" table:style-name="b_tl">
            <text:p>Приход</text:p>
          </table:table-cell>
          <table:table-cell office:value-type="string" office:string-value="" table:style-name="b_tl">
            <text:p/>
          </table:table-cell>
          <table:table-cell office:value-type="float" office:value="32550.0" table:style-name="b_num">
            <text:p>32550,0</text:p>
          </table:table-cell>
          <table:table-cell office:value-type="float" office:value="33255.0" table:style-name="b_num">
            <text:p>33255,0</text:p>
          </table:table-cell>
          <table:table-cell office:value-type="float" office:value="33960.0" table:style-name="b_num">
            <text:p>33960,0</text:p>
          </table:table-cell>
          <table:table-cell office:value-type="float" office:value="34665.0" table:style-name="b_num">
            <text:p>34665,0</text:p>
          </table:table-cell>
          <table:table-cell office:value-type="float" office:value="35370.0" table:style-name="b_num">
            <text:p>35370,0</text:p>
          </table:table-cell>
          <table:table-cell office:value-type="float" office:value="32982.0" table:style-name="b_num">
            <text:p>32982,0</text:p>
          </table:table-cell>
          <table:table-cell office:value-type="float" office:value="202782.0" table:formula="of:=SUM([.C10:.H10])" table:style-name="b_num">
            <text:p>202782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Затраты на товар" table:style-name="b_tl">
            <text:p>Затраты на товар</text:p>
          </table:table-cell>
          <table:table-cell office:value-type="string" office:string-value="" table:style-name="b_tl">
            <text:p/>
          </table:table-cell>
          <table:table-cell office:value-type="float" office:value="19316.0" table:style-name="b_num">
            <text:p>19316,0</text:p>
          </table:table-cell>
          <table:table-cell office:value-type="float" office:value="19455.0" table:style-name="b_num">
            <text:p>19455,0</text:p>
          </table:table-cell>
          <table:table-cell office:value-type="float" office:value="19680.0" table:style-name="b_num">
            <text:p>19680,0</text:p>
          </table:table-cell>
          <table:table-cell office:value-type="float" office:value="19905.0" table:style-name="b_num">
            <text:p>19905,0</text:p>
          </table:table-cell>
          <table:table-cell office:value-type="float" office:value="20130.0" table:style-name="b_num">
            <text:p>20130,0</text:p>
          </table:table-cell>
          <table:table-cell office:value-type="float" office:value="20640.0" table:style-name="b_num">
            <text:p>20640,0</text:p>
          </table:table-cell>
          <table:table-cell office:value-type="float" office:value="119126.0" table:formula="of:=SUM([.C11:.H11])" table:style-name="b_num">
            <text:p>119126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олная выручка" table:style-name="b_tl">
            <text:p>Полная выручка</text:p>
          </table:table-cell>
          <table:table-cell office:value-type="string" office:string-value="" table:style-name="b_tl">
            <text:p/>
          </table:table-cell>
          <table:table-cell office:value-type="float" office:value="13234.0" table:formula="of:=[.C10]-[.C11]" table:style-name="b_num">
            <text:p>13234,0</text:p>
          </table:table-cell>
          <table:table-cell office:value-type="float" office:value="13800.0" table:formula="of:=[.D10]-[.D11]" table:style-name="b_num">
            <text:p>13800,0</text:p>
          </table:table-cell>
          <table:table-cell office:value-type="float" office:value="14280.0" table:formula="of:=[.E10]-[.E11]" table:style-name="b_num">
            <text:p>14280,0</text:p>
          </table:table-cell>
          <table:table-cell office:value-type="float" office:value="14760.0" table:formula="of:=[.F10]-[.F11]" table:style-name="b_num">
            <text:p>14760,0</text:p>
          </table:table-cell>
          <table:table-cell office:value-type="float" office:value="15240.0" table:formula="of:=[.G10]-[.G11]" table:style-name="b_num">
            <text:p>15240,0</text:p>
          </table:table-cell>
          <table:table-cell office:value-type="float" office:value="12342.0" table:formula="of:=[.H10]-[.H11]" table:style-name="b_num">
            <text:p>12342,0</text:p>
          </table:table-cell>
          <table:table-cell office:value-type="float" office:value="83656.0" table:formula="of:=SUM([.C12:.H12])" table:style-name="b_num">
            <text:p>83656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Статьи расходов" table:number-columns-spanned="9" table:style-name="b_sec">
            <text:p>Статьи расходов</text:p>
          </table:table-cell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Реклама" table:style-name="b_tl">
            <text:p>Реклама</text:p>
          </table:table-cell>
          <table:table-cell office:value-type="string" office:string-value="" table:style-name="b_tl">
            <text:p/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24000.0" table:formula="of:=SUM([.C15:.H15])" table:style-name="b_num">
            <text:p>2400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Аренда помещений" table:style-name="b_tl">
            <text:p>Аренда помещений</text:p>
          </table:table-cell>
          <table:table-cell office:value-type="string" office:string-value="" table:style-name="b_tl">
            <text:p/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3000.0" table:formula="of:=SUM([.C16:.H16])" table:style-name="b_num">
            <text:p>300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Налоги и выплаты" table:style-name="b_tl">
            <text:p>Налоги и выплаты</text:p>
          </table:table-cell>
          <table:table-cell office:value-type="string" office:string-value="" table:style-name="b_tl">
            <text:p/>
          </table:table-cell>
          <table:table-cell office:value-type="float" office:value="240.0" table:style-name="b_num">
            <text:p>240,0</text:p>
          </table:table-cell>
          <table:table-cell office:value-type="float" office:value="241.0" table:style-name="b_num">
            <text:p>241,0</text:p>
          </table:table-cell>
          <table:table-cell office:value-type="float" office:value="242.0" table:style-name="b_num">
            <text:p>242,0</text:p>
          </table:table-cell>
          <table:table-cell office:value-type="float" office:value="243.0" table:style-name="b_num">
            <text:p>243,0</text:p>
          </table:table-cell>
          <table:table-cell office:value-type="float" office:value="244.0" table:style-name="b_num">
            <text:p>244,0</text:p>
          </table:table-cell>
          <table:table-cell office:value-type="float" office:value="245.0" table:style-name="b_num">
            <text:p>245,0</text:p>
          </table:table-cell>
          <table:table-cell office:value-type="float" office:value="1455.0" table:formula="of:=SUM([.C17:.H17])" table:style-name="b_num">
            <text:p>1455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роценты по кредитам" table:style-name="b_tl">
            <text:p>Проценты по кредитам</text:p>
          </table:table-cell>
          <table:table-cell office:value-type="string" office:string-value="" table:style-name="b_tl">
            <text:p/>
          </table:table-cell>
          <table:table-cell office:value-type="float" office:value="800.0" table:style-name="b_num">
            <text:p>800,0</text:p>
          </table:table-cell>
          <table:table-cell office:value-type="float" office:value="807.0" table:style-name="b_num">
            <text:p>807,0</text:p>
          </table:table-cell>
          <table:table-cell office:value-type="float" office:value="814.0" table:style-name="b_num">
            <text:p>814,0</text:p>
          </table:table-cell>
          <table:table-cell office:value-type="float" office:value="821.0" table:style-name="b_num">
            <text:p>821,0</text:p>
          </table:table-cell>
          <table:table-cell office:value-type="float" office:value="828.0" table:style-name="b_num">
            <text:p>828,0</text:p>
          </table:table-cell>
          <table:table-cell office:value-type="float" office:value="835.0" table:style-name="b_num">
            <text:p>835,0</text:p>
          </table:table-cell>
          <table:table-cell office:value-type="float" office:value="4905.0" table:formula="of:=SUM([.C18:.H18])" table:style-name="b_num">
            <text:p>4905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Расходы всего" table:style-name="b_tl">
            <text:p>Расходы всего</text:p>
          </table:table-cell>
          <table:table-cell office:value-type="string" office:string-value="" table:style-name="b_tl">
            <text:p/>
          </table:table-cell>
          <table:table-cell office:value-type="float" office:value="0.0" table:formula="of:=SUM([.C15:.C18])" table:style-name="b_num">
            <text:p>0,0</text:p>
          </table:table-cell>
          <table:table-cell office:value-type="float" office:value="0.0" table:formula="of:=SUM([.D15:.D18])" table:style-name="b_num">
            <text:p>0,0</text:p>
          </table:table-cell>
          <table:table-cell office:value-type="float" office:value="0.0" table:formula="of:=SUM([.E15:.E18])" table:style-name="b_num">
            <text:p>0,0</text:p>
          </table:table-cell>
          <table:table-cell office:value-type="float" office:value="0.0" table:formula="of:=SUM([.F15:.F18])" table:style-name="b_num">
            <text:p>0,0</text:p>
          </table:table-cell>
          <table:table-cell office:value-type="float" office:value="0.0" table:formula="of:=SUM([.G15:.G18])" table:style-name="b_num">
            <text:p>0,0</text:p>
          </table:table-cell>
          <table:table-cell office:value-type="float" office:value="0.0" table:formula="of:=SUM([.H15:.H18])" table:style-name="b_num">
            <text:p>0,0</text:p>
          </table:table-cell>
          <table:table-cell office:value-type="float" office:value="0.0" table:formula="of:=SUM([.C19:.H19]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рибыль" table:style-name="b_plbl">
            <text:p>Прибыль</text:p>
          </table:table-cell>
          <table:table-cell office:value-type="string" office:string-value="" table:style-name="b_plbl">
            <text:p/>
          </table:table-cell>
          <table:table-cell office:value-type="float" office:value="0.0" table:formula="of:=[.C12]-[.C19]" table:style-name="b_pval">
            <text:p>0,0</text:p>
          </table:table-cell>
          <table:table-cell office:value-type="float" office:value="0.0" table:formula="of:=[.D12]-[.D19]" table:style-name="b_pval">
            <text:p>0,0</text:p>
          </table:table-cell>
          <table:table-cell office:value-type="float" office:value="0.0" table:formula="of:=[.E12]-[.E19]" table:style-name="b_pval">
            <text:p>0,0</text:p>
          </table:table-cell>
          <table:table-cell office:value-type="float" office:value="0.0" table:formula="of:=[.F12]-[.F19]" table:style-name="b_pval">
            <text:p>0,0</text:p>
          </table:table-cell>
          <table:table-cell office:value-type="float" office:value="0.0" table:formula="of:=[.G12]-[.G19]" table:style-name="b_pval">
            <text:p>0,0</text:p>
          </table:table-cell>
          <table:table-cell office:value-type="float" office:value="0.0" table:formula="of:=[.H12]-[.H19]" table:style-name="b_pval">
            <text:p>0,0</text:p>
          </table:table-cell>
          <table:table-cell office:value-type="float" office:value="0.0" table:formula="of:=[.I12]-[.I19]" table:style-name="b_pval">
            <text:p>0,0</text:p>
          </table:table-cell>
        </table:table-row>
      </table:table>
      <table:table table:name="Расходы фирмы">
        <table:table-column/>
        <table:table-column/>
        <table:table-column/>
        <table:table-column/>
        <table:table-column/>
        <table:table-row>
          <table:table-cell office:value-type="string" office:string-value="Расходы фирмы за второе полугодие 2019 года" table:number-columns-spanned="5" table:style-name="u_merge">
            <text:p>Расходы фирмы за второе полугодие 2019 года</text:p>
          </table:table-cell>
          <table:covered-table-cell table:style-name="u_cov"/>
          <table:covered-table-cell table:style-name="u_cov"/>
          <table:covered-table-cell table:style-name="u_cov"/>
          <table:covered-table-cell table:style-name="u_cov"/>
        </table:table-row>
        <table:table-row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</table:table-row>
        <table:table-row>
          <table:table-cell office:value-type="string" office:string-value="Месяц" table:style-name="u_hdr">
            <text:p>Месяц</text:p>
          </table:table-cell>
          <table:table-cell office:value-type="string" office:string-value="Аренда" table:style-name="u_hdr">
            <text:p>Аренда</text:p>
          </table:table-cell>
          <table:table-cell office:value-type="string" office:string-value="Заработная плата" table:style-name="u_hdr">
            <text:p>Заработная плата</text:p>
          </table:table-cell>
          <table:table-cell office:value-type="string" office:string-value="Запчасти" table:style-name="u_hdr">
            <text:p>Запчасти</text:p>
          </table:table-cell>
          <table:table-cell office:value-type="string" office:string-value="Общие расходы" table:style-name="u_hdr">
            <text:p>Общие расходы</text:p>
          </table:table-cell>
        </table:table-row>
        <table:table-row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</table:table-row>
        <table:table-row>
          <table:table-cell office:value-type="string" office:string-value="Июль" table:style-name="u_tl">
            <text:p>Июль</text:p>
          </table:table-cell>
          <table:table-cell office:value-type="float" office:value="35000.0" table:style-name="u_num">
            <text:p>35000,0</text:p>
          </table:table-cell>
          <table:table-cell office:value-type="float" office:value="8400.0" table:style-name="u_num">
            <text:p>8400,0</text:p>
          </table:table-cell>
          <table:table-cell office:value-type="float" office:value="28000.0" table:style-name="u_num">
            <text:p>28000,0</text:p>
          </table:table-cell>
          <table:table-cell office:value-type="float" office:value="71400.0" table:formula="of:=[.B5]+[.C5]+[.D5]" table:style-name="u_num">
            <text:p>71400,0</text:p>
          </table:table-cell>
        </table:table-row>
        <table:table-row>
          <table:table-cell office:value-type="string" office:string-value="Август" table:style-name="u_tl">
            <text:p>Август</text:p>
          </table:table-cell>
          <table:table-cell office:value-type="float" office:value="35000.0" table:style-name="u_num">
            <text:p>35000,0</text:p>
          </table:table-cell>
          <table:table-cell office:value-type="float" office:value="8400.0" table:style-name="u_num">
            <text:p>8400,0</text:p>
          </table:table-cell>
          <table:table-cell office:value-type="float" office:value="31500.0" table:style-name="u_num">
            <text:p>31500,0</text:p>
          </table:table-cell>
          <table:table-cell office:value-type="float" office:value="74900.0" table:formula="of:=[.B6]+[.C6]+[.D6]" table:style-name="u_num">
            <text:p>74900,0</text:p>
          </table:table-cell>
        </table:table-row>
        <table:table-row>
          <table:table-cell office:value-type="string" office:string-value="Сентябрь" table:style-name="u_tl">
            <text:p>Сентябрь</text:p>
          </table:table-cell>
          <table:table-cell office:value-type="float" office:value="35000.0" table:style-name="u_num">
            <text:p>35000,0</text:p>
          </table:table-cell>
          <table:table-cell office:value-type="float" office:value="9100.0" table:style-name="u_num">
            <text:p>9100,0</text:p>
          </table:table-cell>
          <table:table-cell office:value-type="float" office:value="31500.0" table:style-name="u_num">
            <text:p>31500,0</text:p>
          </table:table-cell>
          <table:table-cell office:value-type="float" office:value="75600.0" table:formula="of:=[.B7]+[.C7]+[.D7]" table:style-name="u_num">
            <text:p>75600,0</text:p>
          </table:table-cell>
        </table:table-row>
        <table:table-row>
          <table:table-cell office:value-type="string" office:string-value="Октябрь" table:style-name="u_tl">
            <text:p>Октябрь</text:p>
          </table:table-cell>
          <table:table-cell office:value-type="float" office:value="42000.0" table:style-name="u_num">
            <text:p>42000,0</text:p>
          </table:table-cell>
          <table:table-cell office:value-type="float" office:value="9100.0" table:style-name="u_num">
            <text:p>9100,0</text:p>
          </table:table-cell>
          <table:table-cell office:value-type="float" office:value="31500.0" table:style-name="u_num">
            <text:p>31500,0</text:p>
          </table:table-cell>
          <table:table-cell office:value-type="float" office:value="82600.0" table:formula="of:=[.B8]+[.C8]+[.D8]" table:style-name="u_num">
            <text:p>82600,0</text:p>
          </table:table-cell>
        </table:table-row>
        <table:table-row>
          <table:table-cell office:value-type="string" office:string-value="Ноябрь" table:style-name="u_tl">
            <text:p>Ноябрь</text:p>
          </table:table-cell>
          <table:table-cell office:value-type="float" office:value="42000.0" table:style-name="u_num">
            <text:p>42000,0</text:p>
          </table:table-cell>
          <table:table-cell office:value-type="float" office:value="9100.0" table:style-name="u_num">
            <text:p>9100,0</text:p>
          </table:table-cell>
          <table:table-cell office:value-type="float" office:value="35000.0" table:style-name="u_num">
            <text:p>35000,0</text:p>
          </table:table-cell>
          <table:table-cell office:value-type="float" office:value="86100.0" table:formula="of:=[.B9]+[.C9]+[.D9]" table:style-name="u_num">
            <text:p>86100,0</text:p>
          </table:table-cell>
        </table:table-row>
        <table:table-row>
          <table:table-cell office:value-type="string" office:string-value="Декабрь" table:style-name="u_tl">
            <text:p>Декабрь</text:p>
          </table:table-cell>
          <table:table-cell office:value-type="float" office:value="42000.0" table:style-name="u_num">
            <text:p>42000,0</text:p>
          </table:table-cell>
          <table:table-cell office:value-type="float" office:value="9800.0" table:style-name="u_num">
            <text:p>9800,0</text:p>
          </table:table-cell>
          <table:table-cell office:value-type="float" office:value="38500.0" table:style-name="u_num">
            <text:p>38500,0</text:p>
          </table:table-cell>
          <table:table-cell office:value-type="float" office:value="90300.0" table:formula="of:=[.B10]+[.C10]+[.D10]" table:style-name="u_num">
            <text:p>90300,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