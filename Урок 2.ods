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b_tl" style:family="table-cell" style:parent-style-name="Default" style:display-name="b_tl">
      <style:table-cell-properties fo:border="0.06pt solid #000000" style:vertical-align="middle"/>
      <style:paragraph-properties fo:text-align="start"/>
      <style:text-properties fo:font-family="Arial"/>
    </style:style>
    <style:style style:name="b_hdr" style:family="table-cell" style:parent-style-name="Default" style:display-name="b_hdr">
      <style:table-cell-properties fo:border="0.06pt solid #000000" style:vertical-align="middle" fo:background-color="#e2efda"/>
      <style:paragraph-properties fo:text-align="center"/>
      <style:text-properties fo:font-family="Arial" fo:font-weight="bold"/>
    </style:style>
    <style:style style:name="b_num" style:family="table-cell" style:parent-style-name="Default" style:display-name="b_num">
      <style:table-cell-properties fo:border="0.06pt solid #000000" style:vertical-align="middle"/>
      <style:paragraph-properties fo:text-align="end"/>
      <style:text-properties fo:font-family="Arial"/>
    </style:style>
    <style:style style:name="b_merge" style:family="table-cell" style:parent-style-name="Default" style:display-name="b_merge">
      <style:table-cell-properties fo:border="0.06pt solid #000000" style:vertical-align="middle" fo:background-color="#e2efda"/>
      <style:paragraph-properties fo:text-align="center"/>
      <style:text-properties fo:font-family="Arial" fo:font-weight="bold"/>
    </style:style>
    <style:style style:name="b_sec" style:family="table-cell" style:parent-style-name="Default" style:display-name="b_sec">
      <style:table-cell-properties fo:border="0.06pt solid #000000" style:vertical-align="middle" fo:background-color="#e2efda"/>
      <style:paragraph-properties fo:text-align="center"/>
      <style:text-properties fo:font-family="Arial" fo:font-weight="bold"/>
    </style:style>
    <style:style style:name="b_plbl" style:family="table-cell" style:parent-style-name="Default" style:display-name="b_plbl">
      <style:table-cell-properties fo:border="0.06pt solid #000000" style:vertical-align="middle" fo:background-color="#fff2cc"/>
      <style:paragraph-properties fo:text-align="start"/>
      <style:text-properties fo:font-family="Arial" fo:font-weight="bold"/>
    </style:style>
    <style:style style:name="b_pval" style:family="table-cell" style:parent-style-name="Default" style:display-name="b_pval">
      <style:table-cell-properties fo:border="0.06pt solid #000000" style:vertical-align="middle" fo:background-color="#fce4d6"/>
      <style:paragraph-properties fo:text-align="end"/>
      <style:text-properties fo:font-family="Arial"/>
    </style:style>
    <style:style style:name="b_cov" style:family="table-cell" style:parent-style-name="Default" style:display-name="b_cov">
      <style:table-cell-properties fo:border="0.06pt solid #000000" style:vertical-align="middle"/>
      <style:paragraph-properties fo:text-align="center"/>
      <style:text-properties fo:font-family="Arial"/>
    </style:style>
  </office:automatic-styles>
  <office:body>
    <office:spreadsheet>
      <table:table table:name="Бюджет 201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office:string-value="Торговый бюджет: 2019 финансовый год" table:number-columns-spanned="9" table:style-name="b_merge">
            <text:p>Торговый бюджет: 2019 финансовый год</text:p>
          </table:table-cell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Составил" table:style-name="b_tl">
            <text:p>Составил</text:p>
          </table:table-cell>
          <table:table-cell office:value-type="string" office:string-value="Иванов И.И." table:style-name="b_tl">
            <text:p>Иванов И.И.</text:p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Дата" table:style-name="b_tl">
            <text:p>Дата</text:p>
          </table:table-cell>
          <table:table-cell office:value-type="date" office:date-value="2026-05-11" table:formula="of:=TODAY()" table:style-name="b_tl">
            <text:p>11.05.2026</text:p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Исходные данные" table:style-name="b_hdr">
            <text:p>Исходные данные</text:p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" table:style-name="b_hdr">
            <text:p/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Рост объёма продаж" table:style-name="b_tl">
            <text:p>Рост объёма продаж</text:p>
          </table:table-cell>
          <table:table-cell office:value-type="float" office:value="1.5" table:style-name="b_num">
            <text:p>1,5</text:p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Удорожание товаров" table:style-name="b_tl">
            <text:p>Удорожание товаров</text:p>
          </table:table-cell>
          <table:table-cell office:value-type="float" office:value="0.9" table:style-name="b_num">
            <text:p>0,9</text:p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hdr">
            <text:p/>
          </table:table-cell>
          <table:table-cell office:value-type="string" office:string-value="Март" table:style-name="b_hdr">
            <text:p>Март</text:p>
          </table:table-cell>
          <table:table-cell office:value-type="string" office:string-value="Апрель" table:style-name="b_hdr">
            <text:p>Апрель</text:p>
          </table:table-cell>
          <table:table-cell office:value-type="string" office:string-value="Май" table:style-name="b_hdr">
            <text:p>Май</text:p>
          </table:table-cell>
          <table:table-cell office:value-type="string" office:string-value="Июнь" table:style-name="b_hdr">
            <text:p>Июнь</text:p>
          </table:table-cell>
          <table:table-cell office:value-type="string" office:string-value="Июль" table:style-name="b_hdr">
            <text:p>Июль</text:p>
          </table:table-cell>
          <table:table-cell office:value-type="string" office:string-value="Август" table:style-name="b_hdr">
            <text:p>Август</text:p>
          </table:table-cell>
          <table:table-cell office:value-type="string" office:string-value="Всего" table:style-name="b_hdr">
            <text:p>Всего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Приход" table:style-name="b_tl">
            <text:p>Приход</text:p>
          </table:table-cell>
          <table:table-cell office:value-type="string" office:string-value="" table:style-name="b_tl">
            <text:p/>
          </table:table-cell>
          <table:table-cell office:value-type="float" office:value="32550.0" table:style-name="b_num">
            <text:p>32550,0</text:p>
          </table:table-cell>
          <table:table-cell office:value-type="float" office:value="0.0" table:formula="of:=[.C10]+[.C10]*[.$C$6]" table:style-name="b_num">
            <text:p>0,0</text:p>
          </table:table-cell>
          <table:table-cell office:value-type="float" office:value="0.0" table:formula="of:=[.D10]+[.D10]*[.$C$6]" table:style-name="b_num">
            <text:p>0,0</text:p>
          </table:table-cell>
          <table:table-cell office:value-type="float" office:value="0.0" table:formula="of:=[.E10]+[.E10]*[.$C$6]" table:style-name="b_num">
            <text:p>0,0</text:p>
          </table:table-cell>
          <table:table-cell office:value-type="float" office:value="0.0" table:formula="of:=[.F10]+[.F10]*[.$C$6]" table:style-name="b_num">
            <text:p>0,0</text:p>
          </table:table-cell>
          <table:table-cell office:value-type="float" office:value="0.0" table:formula="of:=[.G10]+[.G10]*[.$C$6]" table:style-name="b_num">
            <text:p>0,0</text:p>
          </table:table-cell>
          <table:table-cell office:value-type="float" office:value="0.0" table:formula="of:=SUM([.C10:.H10])" table:style-name="b_num">
            <text:p>0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Затраты на товар" table:style-name="b_tl">
            <text:p>Затраты на товар</text:p>
          </table:table-cell>
          <table:table-cell office:value-type="string" office:string-value="" table:style-name="b_tl">
            <text:p/>
          </table:table-cell>
          <table:table-cell office:value-type="float" office:value="19316.0" table:style-name="b_num">
            <text:p>19316,0</text:p>
          </table:table-cell>
          <table:table-cell office:value-type="float" office:value="0.0" table:formula="of:=[.C11]+[.C11]*[.$C$7]" table:style-name="b_num">
            <text:p>0,0</text:p>
          </table:table-cell>
          <table:table-cell office:value-type="float" office:value="0.0" table:formula="of:=[.D11]+[.D11]*[.$C$7]" table:style-name="b_num">
            <text:p>0,0</text:p>
          </table:table-cell>
          <table:table-cell office:value-type="float" office:value="0.0" table:formula="of:=[.E11]+[.E11]*[.$C$7]" table:style-name="b_num">
            <text:p>0,0</text:p>
          </table:table-cell>
          <table:table-cell office:value-type="float" office:value="0.0" table:formula="of:=[.F11]+[.F11]*[.$C$7]" table:style-name="b_num">
            <text:p>0,0</text:p>
          </table:table-cell>
          <table:table-cell office:value-type="float" office:value="0.0" table:formula="of:=[.G11]+[.G11]*[.$C$7]" table:style-name="b_num">
            <text:p>0,0</text:p>
          </table:table-cell>
          <table:table-cell office:value-type="float" office:value="0.0" table:formula="of:=SUM([.C11:.H11])" table:style-name="b_num">
            <text:p>0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Полная выручка" table:style-name="b_tl">
            <text:p>Полная выручка</text:p>
          </table:table-cell>
          <table:table-cell office:value-type="string" office:string-value="" table:style-name="b_tl">
            <text:p/>
          </table:table-cell>
          <table:table-cell office:value-type="float" office:value="0.0" table:formula="of:=[.C10]-[.C11]" table:style-name="b_num">
            <text:p>0,0</text:p>
          </table:table-cell>
          <table:table-cell office:value-type="float" office:value="0.0" table:formula="of:=[.D10]-[.D11]" table:style-name="b_num">
            <text:p>0,0</text:p>
          </table:table-cell>
          <table:table-cell office:value-type="float" office:value="0.0" table:formula="of:=[.E10]-[.E11]" table:style-name="b_num">
            <text:p>0,0</text:p>
          </table:table-cell>
          <table:table-cell office:value-type="float" office:value="0.0" table:formula="of:=[.F10]-[.F11]" table:style-name="b_num">
            <text:p>0,0</text:p>
          </table:table-cell>
          <table:table-cell office:value-type="float" office:value="0.0" table:formula="of:=[.G10]-[.G11]" table:style-name="b_num">
            <text:p>0,0</text:p>
          </table:table-cell>
          <table:table-cell office:value-type="float" office:value="0.0" table:formula="of:=[.H10]-[.H11]" table:style-name="b_num">
            <text:p>0,0</text:p>
          </table:table-cell>
          <table:table-cell office:value-type="float" office:value="0.0" table:formula="of:=SUM([.C12:.H12])" table:style-name="b_num">
            <text:p>0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  <table:table-cell office:value-type="string" office:string-value="" table:style-name="b_tl">
            <text:p/>
          </table:table-cell>
        </table:table-row>
        <table:table-row>
          <table:table-cell office:value-type="string" office:string-value="Статьи расходов" table:number-columns-spanned="9" table:style-name="b_sec">
            <text:p>Статьи расходов</text:p>
          </table:table-cell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  <table:covered-table-cell table:style-name="b_cov"/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Реклама" table:style-name="b_tl">
            <text:p>Реклама</text:p>
          </table:table-cell>
          <table:table-cell office:value-type="string" office:string-value="" table:style-name="b_tl">
            <text:p/>
          </table:table-cell>
          <table:table-cell office:value-type="float" office:value="4000.0" table:style-name="b_num">
            <text:p>4000,0</text:p>
          </table:table-cell>
          <table:table-cell office:value-type="float" office:value="4000.0" table:style-name="b_num">
            <text:p>4000,0</text:p>
          </table:table-cell>
          <table:table-cell office:value-type="float" office:value="4000.0" table:style-name="b_num">
            <text:p>4000,0</text:p>
          </table:table-cell>
          <table:table-cell office:value-type="float" office:value="4000.0" table:style-name="b_num">
            <text:p>4000,0</text:p>
          </table:table-cell>
          <table:table-cell office:value-type="float" office:value="4000.0" table:style-name="b_num">
            <text:p>4000,0</text:p>
          </table:table-cell>
          <table:table-cell office:value-type="float" office:value="4000.0" table:style-name="b_num">
            <text:p>4000,0</text:p>
          </table:table-cell>
          <table:table-cell office:value-type="float" office:value="24000.0" table:formula="of:=SUM([.C15:.H15])" table:style-name="b_num">
            <text:p>24000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Аренда помещений" table:style-name="b_tl">
            <text:p>Аренда помещений</text:p>
          </table:table-cell>
          <table:table-cell office:value-type="string" office:string-value="" table:style-name="b_tl">
            <text:p/>
          </table:table-cell>
          <table:table-cell office:value-type="float" office:value="500.0" table:style-name="b_num">
            <text:p>500,0</text:p>
          </table:table-cell>
          <table:table-cell office:value-type="float" office:value="500.0" table:style-name="b_num">
            <text:p>500,0</text:p>
          </table:table-cell>
          <table:table-cell office:value-type="float" office:value="500.0" table:style-name="b_num">
            <text:p>500,0</text:p>
          </table:table-cell>
          <table:table-cell office:value-type="float" office:value="500.0" table:style-name="b_num">
            <text:p>500,0</text:p>
          </table:table-cell>
          <table:table-cell office:value-type="float" office:value="500.0" table:style-name="b_num">
            <text:p>500,0</text:p>
          </table:table-cell>
          <table:table-cell office:value-type="float" office:value="500.0" table:style-name="b_num">
            <text:p>500,0</text:p>
          </table:table-cell>
          <table:table-cell office:value-type="float" office:value="3000.0" table:formula="of:=SUM([.C16:.H16])" table:style-name="b_num">
            <text:p>3000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Налоги и выплаты" table:style-name="b_tl">
            <text:p>Налоги и выплаты</text:p>
          </table:table-cell>
          <table:table-cell office:value-type="string" office:string-value="" table:style-name="b_tl">
            <text:p/>
          </table:table-cell>
          <table:table-cell office:value-type="float" office:value="240.0" table:style-name="b_num">
            <text:p>240,0</text:p>
          </table:table-cell>
          <table:table-cell office:value-type="float" office:value="0.0" table:formula="of:=[.C17]+[.C17]*0.4" table:style-name="b_num">
            <text:p>0,0</text:p>
          </table:table-cell>
          <table:table-cell office:value-type="float" office:value="0.0" table:formula="of:=[.D17]+[.D17]*0.4" table:style-name="b_num">
            <text:p>0,0</text:p>
          </table:table-cell>
          <table:table-cell office:value-type="float" office:value="0.0" table:formula="of:=[.E17]+[.E17]*0.4" table:style-name="b_num">
            <text:p>0,0</text:p>
          </table:table-cell>
          <table:table-cell office:value-type="float" office:value="0.0" table:formula="of:=[.F17]+[.F17]*0.4" table:style-name="b_num">
            <text:p>0,0</text:p>
          </table:table-cell>
          <table:table-cell office:value-type="float" office:value="0.0" table:formula="of:=[.G17]+[.G17]*0.4" table:style-name="b_num">
            <text:p>0,0</text:p>
          </table:table-cell>
          <table:table-cell office:value-type="float" office:value="0.0" table:formula="of:=SUM([.C17:.H17])" table:style-name="b_num">
            <text:p>0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Проценты по кредитам" table:style-name="b_tl">
            <text:p>Проценты по кредитам</text:p>
          </table:table-cell>
          <table:table-cell office:value-type="string" office:string-value="" table:style-name="b_tl">
            <text:p/>
          </table:table-cell>
          <table:table-cell office:value-type="float" office:value="800.0" table:style-name="b_num">
            <text:p>800,0</text:p>
          </table:table-cell>
          <table:table-cell office:value-type="float" office:value="0.0" table:formula="of:=[.C18]+7" table:style-name="b_num">
            <text:p>0,0</text:p>
          </table:table-cell>
          <table:table-cell office:value-type="float" office:value="0.0" table:formula="of:=[.D18]+7" table:style-name="b_num">
            <text:p>0,0</text:p>
          </table:table-cell>
          <table:table-cell office:value-type="float" office:value="0.0" table:formula="of:=[.E18]+7" table:style-name="b_num">
            <text:p>0,0</text:p>
          </table:table-cell>
          <table:table-cell office:value-type="float" office:value="0.0" table:formula="of:=[.F18]+7" table:style-name="b_num">
            <text:p>0,0</text:p>
          </table:table-cell>
          <table:table-cell office:value-type="float" office:value="0.0" table:formula="of:=[.G18]+7" table:style-name="b_num">
            <text:p>0,0</text:p>
          </table:table-cell>
          <table:table-cell office:value-type="float" office:value="0.0" table:formula="of:=SUM([.C18:.H18])" table:style-name="b_num">
            <text:p>0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Расходы всего" table:style-name="b_tl">
            <text:p>Расходы всего</text:p>
          </table:table-cell>
          <table:table-cell office:value-type="string" office:string-value="" table:style-name="b_tl">
            <text:p/>
          </table:table-cell>
          <table:table-cell office:value-type="float" office:value="0.0" table:formula="of:=SUM([.C15:.C18])" table:style-name="b_num">
            <text:p>0,0</text:p>
          </table:table-cell>
          <table:table-cell office:value-type="float" office:value="0.0" table:formula="of:=SUM([.D15:.D18])" table:style-name="b_num">
            <text:p>0,0</text:p>
          </table:table-cell>
          <table:table-cell office:value-type="float" office:value="0.0" table:formula="of:=SUM([.E15:.E18])" table:style-name="b_num">
            <text:p>0,0</text:p>
          </table:table-cell>
          <table:table-cell office:value-type="float" office:value="0.0" table:formula="of:=SUM([.F15:.F18])" table:style-name="b_num">
            <text:p>0,0</text:p>
          </table:table-cell>
          <table:table-cell office:value-type="float" office:value="0.0" table:formula="of:=SUM([.G15:.G18])" table:style-name="b_num">
            <text:p>0,0</text:p>
          </table:table-cell>
          <table:table-cell office:value-type="float" office:value="0.0" table:formula="of:=SUM([.H15:.H18])" table:style-name="b_num">
            <text:p>0,0</text:p>
          </table:table-cell>
          <table:table-cell office:value-type="float" office:value="0.0" table:formula="of:=SUM([.C19:.H19])" table:style-name="b_num">
            <text:p>0,0</text:p>
          </table:table-cell>
        </table:table-row>
        <table:table-row>
          <table:table-cell office:value-type="string" office:string-value="" table:style-name="b_tl">
            <text:p/>
          </table:table-cell>
          <table:table-cell office:value-type="string" office:string-value="Прибыль" table:style-name="b_plbl">
            <text:p>Прибыль</text:p>
          </table:table-cell>
          <table:table-cell office:value-type="string" office:string-value="" table:style-name="b_plbl">
            <text:p/>
          </table:table-cell>
          <table:table-cell office:value-type="float" office:value="0.0" table:formula="of:=[.C12]-[.C19]" table:style-name="b_pval">
            <text:p>0,0</text:p>
          </table:table-cell>
          <table:table-cell office:value-type="float" office:value="0.0" table:formula="of:=[.D12]-[.D19]" table:style-name="b_pval">
            <text:p>0,0</text:p>
          </table:table-cell>
          <table:table-cell office:value-type="float" office:value="0.0" table:formula="of:=[.E12]-[.E19]" table:style-name="b_pval">
            <text:p>0,0</text:p>
          </table:table-cell>
          <table:table-cell office:value-type="float" office:value="0.0" table:formula="of:=[.F12]-[.F19]" table:style-name="b_pval">
            <text:p>0,0</text:p>
          </table:table-cell>
          <table:table-cell office:value-type="float" office:value="0.0" table:formula="of:=[.G12]-[.G19]" table:style-name="b_pval">
            <text:p>0,0</text:p>
          </table:table-cell>
          <table:table-cell office:value-type="float" office:value="0.0" table:formula="of:=[.H12]-[.H19]" table:style-name="b_pval">
            <text:p>0,0</text:p>
          </table:table-cell>
          <table:table-cell office:value-type="float" office:value="0.0" table:formula="of:=[.I12]-[.I19]" table:style-name="b_pval">
            <text:p>0,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