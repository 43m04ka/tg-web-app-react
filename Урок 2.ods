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of="urn:oasis:names:tc:opendocument:xmlns:of:1.2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of="urn:oasis:names:tc:opendocument:xmlns:of:1.2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>
    <style:style style:name="b_tl" style:family="table-cell" style:parent-style-name="Default" style:display-name="b_tl">
      <style:table-cell-properties fo:border="0.06pt solid #000000" style:vertical-align="middle"/>
      <style:paragraph-properties fo:text-align="start"/>
      <style:text-properties fo:font-family="Arial"/>
    </style:style>
    <style:style style:name="b_hdr" style:family="table-cell" style:parent-style-name="Default" style:display-name="b_hdr">
      <style:table-cell-properties fo:border="0.06pt solid #000000" style:vertical-align="middle" fo:background-color="#e2efda"/>
      <style:paragraph-properties fo:text-align="center"/>
      <style:text-properties fo:font-family="Arial" fo:font-weight="bold"/>
    </style:style>
    <style:style style:name="b_num" style:family="table-cell" style:parent-style-name="Default" style:display-name="b_num">
      <style:table-cell-properties fo:border="0.06pt solid #000000" style:vertical-align="middle"/>
      <style:paragraph-properties fo:text-align="end"/>
      <style:text-properties fo:font-family="Arial"/>
    </style:style>
    <style:style style:name="b_merge" style:family="table-cell" style:parent-style-name="Default" style:display-name="b_merge">
      <style:table-cell-properties fo:border="0.06pt solid #000000" style:vertical-align="middle" fo:background-color="#e2efda"/>
      <style:paragraph-properties fo:text-align="center"/>
      <style:text-properties fo:font-family="Arial" fo:font-weight="bold"/>
    </style:style>
    <style:style style:name="b_sec" style:family="table-cell" style:parent-style-name="Default" style:display-name="b_sec">
      <style:table-cell-properties fo:border="0.06pt solid #000000" style:vertical-align="middle" fo:background-color="#e2efda"/>
      <style:paragraph-properties fo:text-align="center"/>
      <style:text-properties fo:font-family="Arial" fo:font-weight="bold"/>
    </style:style>
    <style:style style:name="b_plbl" style:family="table-cell" style:parent-style-name="Default" style:display-name="b_plbl">
      <style:table-cell-properties fo:border="0.06pt solid #000000" style:vertical-align="middle" fo:background-color="#fff2cc"/>
      <style:paragraph-properties fo:text-align="start"/>
      <style:text-properties fo:font-family="Arial" fo:font-weight="bold"/>
    </style:style>
    <style:style style:name="b_pval" style:family="table-cell" style:parent-style-name="Default" style:display-name="b_pval">
      <style:table-cell-properties fo:border="0.06pt solid #000000" style:vertical-align="middle" fo:background-color="#fce4d6"/>
      <style:paragraph-properties fo:text-align="end"/>
      <style:text-properties fo:font-family="Arial"/>
    </style:style>
    <style:style style:name="b_cov" style:family="table-cell" style:parent-style-name="Default" style:display-name="b_cov">
      <style:table-cell-properties fo:border="0.06pt solid #000000" style:vertical-align="middle"/>
      <style:paragraph-properties fo:text-align="center"/>
      <style:text-properties fo:font-family="Arial"/>
    </style:style>
  </office:automatic-styles>
  <office:body>
    <office:spreadsheet>
      <table:table table:name="Бюджет 2019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office:string-value="Торговый бюджет: 2019 финансовый год" table:number-columns-spanned="9" table:style-name="b_merge">
            <text:p>Торговый бюджет: 2019 финансовый год</text:p>
          </table:table-cell>
          <table:covered-table-cell table:style-name="b_cov"/>
          <table:covered-table-cell table:style-name="b_cov"/>
          <table:covered-table-cell table:style-name="b_cov"/>
          <table:covered-table-cell table:style-name="b_cov"/>
          <table:covered-table-cell table:style-name="b_cov"/>
          <table:covered-table-cell table:style-name="b_cov"/>
          <table:covered-table-cell table:style-name="b_cov"/>
          <table:covered-table-cell table:style-name="b_cov"/>
        </table:table-row>
        <table:table-row>
          <table:table-cell office:value-type="string" office:string-value="" table:style-name="b_tl">
            <text:p/>
          </table:table-cell>
          <table:table-cell office:value-type="string" office:string-value="Составил" table:style-name="b_tl">
            <text:p>Составил</text:p>
          </table:table-cell>
          <table:table-cell office:value-type="string" office:string-value="Иванов И.И." table:style-name="b_tl">
            <text:p>Иванов И.И.</text:p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</table:table-row>
        <table:table-row>
          <table:table-cell office:value-type="string" office:string-value="" table:style-name="b_tl">
            <text:p/>
          </table:table-cell>
          <table:table-cell office:value-type="string" office:string-value="Дата" table:style-name="b_tl">
            <text:p>Дата</text:p>
          </table:table-cell>
          <table:table-cell office:value-type="date" office:date-value="2026-05-11" table:formula="of:=TODAY()" table:style-name="b_tl">
            <text:p>11.05.2026</text:p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</table:table-row>
        <table:table-row/>
        <table:table-row>
          <table:table-cell office:value-type="string" office:string-value="" table:style-name="b_tl">
            <text:p/>
          </table:table-cell>
          <table:table-cell office:value-type="string" office:string-value="Исходные данные" table:style-name="b_hdr">
            <text:p>Исходные данные</text:p>
          </table:table-cell>
          <table:table-cell office:value-type="string" office:string-value="" table:style-name="b_hdr">
            <text:p/>
          </table:table-cell>
          <table:table-cell office:value-type="string" office:string-value="" table:style-name="b_hdr">
            <text:p/>
          </table:table-cell>
          <table:table-cell office:value-type="string" office:string-value="" table:style-name="b_hdr">
            <text:p/>
          </table:table-cell>
          <table:table-cell office:value-type="string" office:string-value="" table:style-name="b_hdr">
            <text:p/>
          </table:table-cell>
          <table:table-cell office:value-type="string" office:string-value="" table:style-name="b_hdr">
            <text:p/>
          </table:table-cell>
          <table:table-cell office:value-type="string" office:string-value="" table:style-name="b_hdr">
            <text:p/>
          </table:table-cell>
          <table:table-cell office:value-type="string" office:string-value="" table:style-name="b_hdr">
            <text:p/>
          </table:table-cell>
        </table:table-row>
        <table:table-row>
          <table:table-cell office:value-type="string" office:string-value="" table:style-name="b_tl">
            <text:p/>
          </table:table-cell>
          <table:table-cell office:value-type="string" office:string-value="Рост объёма продаж" table:style-name="b_tl">
            <text:p>Рост объёма продаж</text:p>
          </table:table-cell>
          <table:table-cell office:value-type="float" office:value="1.5" table:style-name="b_num">
            <text:p>1,5</text:p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</table:table-row>
        <table:table-row>
          <table:table-cell office:value-type="string" office:string-value="" table:style-name="b_tl">
            <text:p/>
          </table:table-cell>
          <table:table-cell office:value-type="string" office:string-value="Удорожание товаров" table:style-name="b_tl">
            <text:p>Удорожание товаров</text:p>
          </table:table-cell>
          <table:table-cell office:value-type="float" office:value="0.9" table:style-name="b_num">
            <text:p>0,9</text:p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</table:table-row>
        <table:table-row/>
        <table:table-row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hdr">
            <text:p/>
          </table:table-cell>
          <table:table-cell office:value-type="string" office:string-value="Март" table:style-name="b_hdr">
            <text:p>Март</text:p>
          </table:table-cell>
          <table:table-cell office:value-type="string" office:string-value="Апрель" table:style-name="b_hdr">
            <text:p>Апрель</text:p>
          </table:table-cell>
          <table:table-cell office:value-type="string" office:string-value="Май" table:style-name="b_hdr">
            <text:p>Май</text:p>
          </table:table-cell>
          <table:table-cell office:value-type="string" office:string-value="Июнь" table:style-name="b_hdr">
            <text:p>Июнь</text:p>
          </table:table-cell>
          <table:table-cell office:value-type="string" office:string-value="Июль" table:style-name="b_hdr">
            <text:p>Июль</text:p>
          </table:table-cell>
          <table:table-cell office:value-type="string" office:string-value="Август" table:style-name="b_hdr">
            <text:p>Август</text:p>
          </table:table-cell>
          <table:table-cell office:value-type="string" office:string-value="Всего" table:style-name="b_hdr">
            <text:p>Всего</text:p>
          </table:table-cell>
        </table:table-row>
        <table:table-row>
          <table:table-cell office:value-type="string" office:string-value="" table:style-name="b_tl">
            <text:p/>
          </table:table-cell>
          <table:table-cell office:value-type="string" office:string-value="Приход" table:style-name="b_tl">
            <text:p>Приход</text:p>
          </table:table-cell>
          <table:table-cell office:value-type="string" office:string-value="" table:style-name="b_tl">
            <text:p/>
          </table:table-cell>
          <table:table-cell office:value-type="float" office:value="32550.0" table:style-name="b_num">
            <text:p>32550,0</text:p>
          </table:table-cell>
          <table:table-cell office:value-type="float" office:value="0.0" table:formula="of:=C10+C10*$C$6" table:style-name="b_num">
            <text:p>0,0</text:p>
          </table:table-cell>
          <table:table-cell office:value-type="float" office:value="0.0" table:formula="of:=D10+D10*$C$6" table:style-name="b_num">
            <text:p>0,0</text:p>
          </table:table-cell>
          <table:table-cell office:value-type="float" office:value="0.0" table:formula="of:=E10+E10*$C$6" table:style-name="b_num">
            <text:p>0,0</text:p>
          </table:table-cell>
          <table:table-cell office:value-type="float" office:value="0.0" table:formula="of:=F10+F10*$C$6" table:style-name="b_num">
            <text:p>0,0</text:p>
          </table:table-cell>
          <table:table-cell office:value-type="float" office:value="0.0" table:formula="of:=G10+G10*$C$6" table:style-name="b_num">
            <text:p>0,0</text:p>
          </table:table-cell>
          <table:table-cell office:value-type="float" office:value="0.0" table:formula="of:=SUM(C10:H10)" table:style-name="b_num">
            <text:p>0,0</text:p>
          </table:table-cell>
        </table:table-row>
        <table:table-row>
          <table:table-cell office:value-type="string" office:string-value="" table:style-name="b_tl">
            <text:p/>
          </table:table-cell>
          <table:table-cell office:value-type="string" office:string-value="Затраты на товар" table:style-name="b_tl">
            <text:p>Затраты на товар</text:p>
          </table:table-cell>
          <table:table-cell office:value-type="string" office:string-value="" table:style-name="b_tl">
            <text:p/>
          </table:table-cell>
          <table:table-cell office:value-type="float" office:value="19316.0" table:style-name="b_num">
            <text:p>19316,0</text:p>
          </table:table-cell>
          <table:table-cell office:value-type="float" office:value="0.0" table:formula="of:=C11+C11*$C$7" table:style-name="b_num">
            <text:p>0,0</text:p>
          </table:table-cell>
          <table:table-cell office:value-type="float" office:value="0.0" table:formula="of:=D11+D11*$C$7" table:style-name="b_num">
            <text:p>0,0</text:p>
          </table:table-cell>
          <table:table-cell office:value-type="float" office:value="0.0" table:formula="of:=E11+E11*$C$7" table:style-name="b_num">
            <text:p>0,0</text:p>
          </table:table-cell>
          <table:table-cell office:value-type="float" office:value="0.0" table:formula="of:=F11+F11*$C$7" table:style-name="b_num">
            <text:p>0,0</text:p>
          </table:table-cell>
          <table:table-cell office:value-type="float" office:value="0.0" table:formula="of:=G11+G11*$C$7" table:style-name="b_num">
            <text:p>0,0</text:p>
          </table:table-cell>
          <table:table-cell office:value-type="float" office:value="0.0" table:formula="of:=SUM(C11:H11)" table:style-name="b_num">
            <text:p>0,0</text:p>
          </table:table-cell>
        </table:table-row>
        <table:table-row>
          <table:table-cell office:value-type="string" office:string-value="" table:style-name="b_tl">
            <text:p/>
          </table:table-cell>
          <table:table-cell office:value-type="string" office:string-value="Полная выручка" table:style-name="b_tl">
            <text:p>Полная выручка</text:p>
          </table:table-cell>
          <table:table-cell office:value-type="string" office:string-value="" table:style-name="b_tl">
            <text:p/>
          </table:table-cell>
          <table:table-cell office:value-type="float" office:value="0.0" table:formula="of:=C10-C11" table:style-name="b_num">
            <text:p>0,0</text:p>
          </table:table-cell>
          <table:table-cell office:value-type="float" office:value="0.0" table:formula="of:=D10-D11" table:style-name="b_num">
            <text:p>0,0</text:p>
          </table:table-cell>
          <table:table-cell office:value-type="float" office:value="0.0" table:formula="of:=E10-E11" table:style-name="b_num">
            <text:p>0,0</text:p>
          </table:table-cell>
          <table:table-cell office:value-type="float" office:value="0.0" table:formula="of:=F10-F11" table:style-name="b_num">
            <text:p>0,0</text:p>
          </table:table-cell>
          <table:table-cell office:value-type="float" office:value="0.0" table:formula="of:=G10-G11" table:style-name="b_num">
            <text:p>0,0</text:p>
          </table:table-cell>
          <table:table-cell office:value-type="float" office:value="0.0" table:formula="of:=H10-H11" table:style-name="b_num">
            <text:p>0,0</text:p>
          </table:table-cell>
          <table:table-cell office:value-type="float" office:value="0.0" table:formula="of:=SUM(C12:H12)" table:style-name="b_num">
            <text:p>0,0</text:p>
          </table:table-cell>
        </table:table-row>
        <table:table-row/>
        <table:table-row>
          <table:table-cell office:value-type="string" office:string-value="Статьи расходов" table:number-columns-spanned="9" table:style-name="b_sec">
            <text:p>Статьи расходов</text:p>
          </table:table-cell>
          <table:covered-table-cell table:style-name="b_cov"/>
          <table:covered-table-cell table:style-name="b_cov"/>
          <table:covered-table-cell table:style-name="b_cov"/>
          <table:covered-table-cell table:style-name="b_cov"/>
          <table:covered-table-cell table:style-name="b_cov"/>
          <table:covered-table-cell table:style-name="b_cov"/>
          <table:covered-table-cell table:style-name="b_cov"/>
          <table:covered-table-cell table:style-name="b_cov"/>
        </table:table-row>
        <table:table-row>
          <table:table-cell office:value-type="string" office:string-value="" table:style-name="b_tl">
            <text:p/>
          </table:table-cell>
          <table:table-cell office:value-type="string" office:string-value="Реклама" table:style-name="b_tl">
            <text:p>Реклама</text:p>
          </table:table-cell>
          <table:table-cell office:value-type="string" office:string-value="" table:style-name="b_tl">
            <text:p/>
          </table:table-cell>
          <table:table-cell office:value-type="float" office:value="4000.0" table:style-name="b_num">
            <text:p>4000,0</text:p>
          </table:table-cell>
          <table:table-cell office:value-type="float" office:value="4000.0" table:style-name="b_num">
            <text:p>4000,0</text:p>
          </table:table-cell>
          <table:table-cell office:value-type="float" office:value="4000.0" table:style-name="b_num">
            <text:p>4000,0</text:p>
          </table:table-cell>
          <table:table-cell office:value-type="float" office:value="4000.0" table:style-name="b_num">
            <text:p>4000,0</text:p>
          </table:table-cell>
          <table:table-cell office:value-type="float" office:value="4000.0" table:style-name="b_num">
            <text:p>4000,0</text:p>
          </table:table-cell>
          <table:table-cell office:value-type="float" office:value="4000.0" table:style-name="b_num">
            <text:p>4000,0</text:p>
          </table:table-cell>
          <table:table-cell office:value-type="float" office:value="24000.0" table:formula="of:=SUM(C15:H15)" table:style-name="b_num">
            <text:p>24000,0</text:p>
          </table:table-cell>
        </table:table-row>
        <table:table-row>
          <table:table-cell office:value-type="string" office:string-value="" table:style-name="b_tl">
            <text:p/>
          </table:table-cell>
          <table:table-cell office:value-type="string" office:string-value="Аренда помещений" table:style-name="b_tl">
            <text:p>Аренда помещений</text:p>
          </table:table-cell>
          <table:table-cell office:value-type="string" office:string-value="" table:style-name="b_tl">
            <text:p/>
          </table:table-cell>
          <table:table-cell office:value-type="float" office:value="500.0" table:style-name="b_num">
            <text:p>500,0</text:p>
          </table:table-cell>
          <table:table-cell office:value-type="float" office:value="500.0" table:style-name="b_num">
            <text:p>500,0</text:p>
          </table:table-cell>
          <table:table-cell office:value-type="float" office:value="500.0" table:style-name="b_num">
            <text:p>500,0</text:p>
          </table:table-cell>
          <table:table-cell office:value-type="float" office:value="500.0" table:style-name="b_num">
            <text:p>500,0</text:p>
          </table:table-cell>
          <table:table-cell office:value-type="float" office:value="500.0" table:style-name="b_num">
            <text:p>500,0</text:p>
          </table:table-cell>
          <table:table-cell office:value-type="float" office:value="500.0" table:style-name="b_num">
            <text:p>500,0</text:p>
          </table:table-cell>
          <table:table-cell office:value-type="float" office:value="3000.0" table:formula="of:=SUM(C16:H16)" table:style-name="b_num">
            <text:p>3000,0</text:p>
          </table:table-cell>
        </table:table-row>
        <table:table-row>
          <table:table-cell office:value-type="string" office:string-value="" table:style-name="b_tl">
            <text:p/>
          </table:table-cell>
          <table:table-cell office:value-type="string" office:string-value="Налоги и выплаты" table:style-name="b_tl">
            <text:p>Налоги и выплаты</text:p>
          </table:table-cell>
          <table:table-cell office:value-type="string" office:string-value="" table:style-name="b_tl">
            <text:p/>
          </table:table-cell>
          <table:table-cell office:value-type="float" office:value="240.0" table:style-name="b_num">
            <text:p>240,0</text:p>
          </table:table-cell>
          <table:table-cell office:value-type="float" office:value="0.0" table:formula="of:=C17+C17*0.4" table:style-name="b_num">
            <text:p>0,0</text:p>
          </table:table-cell>
          <table:table-cell office:value-type="float" office:value="0.0" table:formula="of:=D17+D17*0.4" table:style-name="b_num">
            <text:p>0,0</text:p>
          </table:table-cell>
          <table:table-cell office:value-type="float" office:value="0.0" table:formula="of:=E17+E17*0.4" table:style-name="b_num">
            <text:p>0,0</text:p>
          </table:table-cell>
          <table:table-cell office:value-type="float" office:value="0.0" table:formula="of:=F17+F17*0.4" table:style-name="b_num">
            <text:p>0,0</text:p>
          </table:table-cell>
          <table:table-cell office:value-type="float" office:value="0.0" table:formula="of:=G17+G17*0.4" table:style-name="b_num">
            <text:p>0,0</text:p>
          </table:table-cell>
          <table:table-cell office:value-type="float" office:value="0.0" table:formula="of:=SUM(C17:H17)" table:style-name="b_num">
            <text:p>0,0</text:p>
          </table:table-cell>
        </table:table-row>
        <table:table-row>
          <table:table-cell office:value-type="string" office:string-value="" table:style-name="b_tl">
            <text:p/>
          </table:table-cell>
          <table:table-cell office:value-type="string" office:string-value="Проценты по кредитам" table:style-name="b_tl">
            <text:p>Проценты по кредитам</text:p>
          </table:table-cell>
          <table:table-cell office:value-type="string" office:string-value="" table:style-name="b_tl">
            <text:p/>
          </table:table-cell>
          <table:table-cell office:value-type="float" office:value="800.0" table:style-name="b_num">
            <text:p>800,0</text:p>
          </table:table-cell>
          <table:table-cell office:value-type="float" office:value="0.0" table:formula="of:=C18+7" table:style-name="b_num">
            <text:p>0,0</text:p>
          </table:table-cell>
          <table:table-cell office:value-type="float" office:value="0.0" table:formula="of:=D18+7" table:style-name="b_num">
            <text:p>0,0</text:p>
          </table:table-cell>
          <table:table-cell office:value-type="float" office:value="0.0" table:formula="of:=E18+7" table:style-name="b_num">
            <text:p>0,0</text:p>
          </table:table-cell>
          <table:table-cell office:value-type="float" office:value="0.0" table:formula="of:=F18+7" table:style-name="b_num">
            <text:p>0,0</text:p>
          </table:table-cell>
          <table:table-cell office:value-type="float" office:value="0.0" table:formula="of:=G18+7" table:style-name="b_num">
            <text:p>0,0</text:p>
          </table:table-cell>
          <table:table-cell office:value-type="float" office:value="0.0" table:formula="of:=SUM(C18:H18)" table:style-name="b_num">
            <text:p>0,0</text:p>
          </table:table-cell>
        </table:table-row>
        <table:table-row>
          <table:table-cell office:value-type="string" office:string-value="" table:style-name="b_tl">
            <text:p/>
          </table:table-cell>
          <table:table-cell office:value-type="string" office:string-value="Расходы всего" table:style-name="b_tl">
            <text:p>Расходы всего</text:p>
          </table:table-cell>
          <table:table-cell office:value-type="string" office:string-value="" table:style-name="b_tl">
            <text:p/>
          </table:table-cell>
          <table:table-cell office:value-type="float" office:value="0.0" table:formula="of:=SUM(C15:C18)" table:style-name="b_num">
            <text:p>0,0</text:p>
          </table:table-cell>
          <table:table-cell office:value-type="float" office:value="0.0" table:formula="of:=SUM(D15:D18)" table:style-name="b_num">
            <text:p>0,0</text:p>
          </table:table-cell>
          <table:table-cell office:value-type="float" office:value="0.0" table:formula="of:=SUM(E15:E18)" table:style-name="b_num">
            <text:p>0,0</text:p>
          </table:table-cell>
          <table:table-cell office:value-type="float" office:value="0.0" table:formula="of:=SUM(F15:F18)" table:style-name="b_num">
            <text:p>0,0</text:p>
          </table:table-cell>
          <table:table-cell office:value-type="float" office:value="0.0" table:formula="of:=SUM(G15:G18)" table:style-name="b_num">
            <text:p>0,0</text:p>
          </table:table-cell>
          <table:table-cell office:value-type="float" office:value="0.0" table:formula="of:=SUM(H15:H18)" table:style-name="b_num">
            <text:p>0,0</text:p>
          </table:table-cell>
          <table:table-cell office:value-type="float" office:value="0.0" table:formula="of:=SUM(C19:H19)" table:style-name="b_num">
            <text:p>0,0</text:p>
          </table:table-cell>
        </table:table-row>
        <table:table-row>
          <table:table-cell office:value-type="string" office:string-value="" table:style-name="b_tl">
            <text:p/>
          </table:table-cell>
          <table:table-cell office:value-type="string" office:string-value="Прибыль" table:style-name="b_plbl">
            <text:p>Прибыль</text:p>
          </table:table-cell>
          <table:table-cell office:value-type="string" office:string-value="" table:style-name="b_plbl">
            <text:p/>
          </table:table-cell>
          <table:table-cell office:value-type="float" office:value="0.0" table:formula="of:=C12-C19" table:style-name="b_pval">
            <text:p>0,0</text:p>
          </table:table-cell>
          <table:table-cell office:value-type="float" office:value="0.0" table:formula="of:=D12-D19" table:style-name="b_pval">
            <text:p>0,0</text:p>
          </table:table-cell>
          <table:table-cell office:value-type="float" office:value="0.0" table:formula="of:=E12-E19" table:style-name="b_pval">
            <text:p>0,0</text:p>
          </table:table-cell>
          <table:table-cell office:value-type="float" office:value="0.0" table:formula="of:=F12-F19" table:style-name="b_pval">
            <text:p>0,0</text:p>
          </table:table-cell>
          <table:table-cell office:value-type="float" office:value="0.0" table:formula="of:=G12-G19" table:style-name="b_pval">
            <text:p>0,0</text:p>
          </table:table-cell>
          <table:table-cell office:value-type="float" office:value="0.0" table:formula="of:=H12-H19" table:style-name="b_pval">
            <text:p>0,0</text:p>
          </table:table-cell>
          <table:table-cell office:value-type="float" office:value="0.0" table:formula="of:=I12-I19" table:style-name="b_pval">
            <text:p>0,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of="urn:oasis:names:tc:opendocument:xmlns:of:1.2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of="urn:oasis:names:tc:opendocument:xmlns:of:1.2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