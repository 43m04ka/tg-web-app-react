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u_tl" style:family="table-cell" style:parent-style-name="Default" style:display-name="u_tl">
      <style:table-cell-properties fo:border="0.06pt solid #000000" style:vertical-align="middle"/>
      <style:paragraph-properties fo:text-align="start"/>
      <style:text-properties fo:font-family="Arial"/>
    </style:style>
    <style:style style:name="u_hdr" style:family="table-cell" style:parent-style-name="Default" style:display-name="u_hdr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u_num" style:family="table-cell" style:parent-style-name="Default" style:display-name="u_num">
      <style:table-cell-properties fo:border="0.06pt solid #000000" style:vertical-align="middle"/>
      <style:paragraph-properties fo:text-align="end"/>
      <style:text-properties fo:font-family="Arial"/>
    </style:style>
    <style:style style:name="u_cov" style:family="table-cell" style:parent-style-name="Default" style:display-name="u_cov">
      <style:table-cell-properties fo:border="0.06pt solid #000000" style:vertical-align="middle"/>
      <style:paragraph-properties fo:text-align="center"/>
      <style:text-properties fo:font-family="Arial"/>
    </style:style>
  </office:automatic-styles>
  <office:body>
    <office:spreadsheet>
      <table:table table:name="Диаграмма типа Линии">
        <table:table-column/>
        <table:table-column/>
        <table:table-row>
          <table:table-cell office:value-type="string" office:string-value="X" table:style-name="u_hdr">
            <text:p>X</text:p>
          </table:table-cell>
          <table:table-cell office:value-type="string" office:string-value="Y=tg X" table:style-name="u_hdr">
            <text:p>Y=tg X</text:p>
          </table:table-cell>
        </table:table-row>
        <table:table-row>
          <table:table-cell office:value-type="float" office:value="-10.0" table:style-name="u_num">
            <text:p>-10,0</text:p>
          </table:table-cell>
          <table:table-cell office:value-type="float" office:value="0.0" table:formula="of:=TAN(A2)" table:style-name="u_num">
            <text:p>0,0</text:p>
          </table:table-cell>
        </table:table-row>
        <table:table-row>
          <table:table-cell office:value-type="float" office:value="-9.0" table:style-name="u_num">
            <text:p>-9,0</text:p>
          </table:table-cell>
          <table:table-cell office:value-type="float" office:value="0.0" table:formula="of:=TAN(A3)" table:style-name="u_num">
            <text:p>0,0</text:p>
          </table:table-cell>
        </table:table-row>
        <table:table-row>
          <table:table-cell office:value-type="float" office:value="-8.0" table:style-name="u_num">
            <text:p>-8,0</text:p>
          </table:table-cell>
          <table:table-cell office:value-type="float" office:value="0.0" table:formula="of:=TAN(A4)" table:style-name="u_num">
            <text:p>0,0</text:p>
          </table:table-cell>
        </table:table-row>
        <table:table-row>
          <table:table-cell office:value-type="float" office:value="-7.0" table:style-name="u_num">
            <text:p>-7,0</text:p>
          </table:table-cell>
          <table:table-cell office:value-type="float" office:value="0.0" table:formula="of:=TAN(A5)" table:style-name="u_num">
            <text:p>0,0</text:p>
          </table:table-cell>
        </table:table-row>
        <table:table-row>
          <table:table-cell office:value-type="float" office:value="-6.0" table:style-name="u_num">
            <text:p>-6,0</text:p>
          </table:table-cell>
          <table:table-cell office:value-type="float" office:value="0.0" table:formula="of:=TAN(A6)" table:style-name="u_num">
            <text:p>0,0</text:p>
          </table:table-cell>
        </table:table-row>
        <table:table-row>
          <table:table-cell office:value-type="float" office:value="-5.0" table:style-name="u_num">
            <text:p>-5,0</text:p>
          </table:table-cell>
          <table:table-cell office:value-type="float" office:value="0.0" table:formula="of:=TAN(A7)" table:style-name="u_num">
            <text:p>0,0</text:p>
          </table:table-cell>
        </table:table-row>
        <table:table-row>
          <table:table-cell office:value-type="float" office:value="-4.0" table:style-name="u_num">
            <text:p>-4,0</text:p>
          </table:table-cell>
          <table:table-cell office:value-type="float" office:value="0.0" table:formula="of:=TAN(A8)" table:style-name="u_num">
            <text:p>0,0</text:p>
          </table:table-cell>
        </table:table-row>
        <table:table-row>
          <table:table-cell office:value-type="float" office:value="-3.0" table:style-name="u_num">
            <text:p>-3,0</text:p>
          </table:table-cell>
          <table:table-cell office:value-type="float" office:value="0.0" table:formula="of:=TAN(A9)" table:style-name="u_num">
            <text:p>0,0</text:p>
          </table:table-cell>
        </table:table-row>
        <table:table-row>
          <table:table-cell office:value-type="float" office:value="-2.0" table:style-name="u_num">
            <text:p>-2,0</text:p>
          </table:table-cell>
          <table:table-cell office:value-type="float" office:value="0.0" table:formula="of:=TAN(A10)" table:style-name="u_num">
            <text:p>0,0</text:p>
          </table:table-cell>
        </table:table-row>
        <table:table-row>
          <table:table-cell office:value-type="float" office:value="-1.0" table:style-name="u_num">
            <text:p>-1,0</text:p>
          </table:table-cell>
          <table:table-cell office:value-type="float" office:value="0.0" table:formula="of:=TAN(A11)" table:style-name="u_num">
            <text:p>0,0</text:p>
          </table:table-cell>
        </table:table-row>
        <table:table-row>
          <table:table-cell office:value-type="float" office:value="0.0" table:style-name="u_num">
            <text:p>0,0</text:p>
          </table:table-cell>
          <table:table-cell office:value-type="float" office:value="0.0" table:formula="of:=TAN(A12)" table:style-name="u_num">
            <text:p>0,0</text:p>
          </table:table-cell>
        </table:table-row>
        <table:table-row>
          <table:table-cell office:value-type="float" office:value="1.0" table:style-name="u_num">
            <text:p>1,0</text:p>
          </table:table-cell>
          <table:table-cell office:value-type="float" office:value="0.0" table:formula="of:=TAN(A13)" table:style-name="u_num">
            <text:p>0,0</text:p>
          </table:table-cell>
        </table:table-row>
        <table:table-row>
          <table:table-cell office:value-type="float" office:value="2.0" table:style-name="u_num">
            <text:p>2,0</text:p>
          </table:table-cell>
          <table:table-cell office:value-type="float" office:value="0.0" table:formula="of:=TAN(A14)" table:style-name="u_num">
            <text:p>0,0</text:p>
          </table:table-cell>
        </table:table-row>
        <table:table-row>
          <table:table-cell office:value-type="float" office:value="3.0" table:style-name="u_num">
            <text:p>3,0</text:p>
          </table:table-cell>
          <table:table-cell office:value-type="float" office:value="0.0" table:formula="of:=TAN(A15)" table:style-name="u_num">
            <text:p>0,0</text:p>
          </table:table-cell>
        </table:table-row>
        <table:table-row>
          <table:table-cell office:value-type="float" office:value="4.0" table:style-name="u_num">
            <text:p>4,0</text:p>
          </table:table-cell>
          <table:table-cell office:value-type="float" office:value="0.0" table:formula="of:=TAN(A16)" table:style-name="u_num">
            <text:p>0,0</text:p>
          </table:table-cell>
        </table:table-row>
        <table:table-row>
          <table:table-cell office:value-type="float" office:value="5.0" table:style-name="u_num">
            <text:p>5,0</text:p>
          </table:table-cell>
          <table:table-cell office:value-type="float" office:value="0.0" table:formula="of:=TAN(A17)" table:style-name="u_num">
            <text:p>0,0</text:p>
          </table:table-cell>
        </table:table-row>
        <table:table-row>
          <table:table-cell office:value-type="float" office:value="6.0" table:style-name="u_num">
            <text:p>6,0</text:p>
          </table:table-cell>
          <table:table-cell office:value-type="float" office:value="0.0" table:formula="of:=TAN(A18)" table:style-name="u_num">
            <text:p>0,0</text:p>
          </table:table-cell>
        </table:table-row>
        <table:table-row>
          <table:table-cell office:value-type="float" office:value="7.0" table:style-name="u_num">
            <text:p>7,0</text:p>
          </table:table-cell>
          <table:table-cell office:value-type="float" office:value="0.0" table:formula="of:=TAN(A19)" table:style-name="u_num">
            <text:p>0,0</text:p>
          </table:table-cell>
        </table:table-row>
        <table:table-row>
          <table:table-cell office:value-type="float" office:value="8.0" table:style-name="u_num">
            <text:p>8,0</text:p>
          </table:table-cell>
          <table:table-cell office:value-type="float" office:value="0.0" table:formula="of:=TAN(A20)" table:style-name="u_num">
            <text:p>0,0</text:p>
          </table:table-cell>
        </table:table-row>
        <table:table-row>
          <table:table-cell office:value-type="float" office:value="9.0" table:style-name="u_num">
            <text:p>9,0</text:p>
          </table:table-cell>
          <table:table-cell office:value-type="float" office:value="0.0" table:formula="of:=TAN(A21)" table:style-name="u_num">
            <text:p>0,0</text:p>
          </table:table-cell>
        </table:table-row>
        <table:table-row>
          <table:table-cell office:value-type="float" office:value="10.0" table:style-name="u_num">
            <text:p>10,0</text:p>
          </table:table-cell>
          <table:table-cell office:value-type="float" office:value="0.0" table:formula="of:=TAN(A22)" table:style-name="u_num">
            <text:p>0,0</text:p>
          </table:table-cell>
        </table:table-row>
        <table:table-row/>
        <table:table-row>
          <table:table-cell office:value-type="string" office:string-value="Рисунок 7.5 – диаграмма типа «Линии» по столбцам A:B" table:number-columns-spanned="2" table:style-name="u_tl">
            <text:p>Рисунок 7.5 – диаграмма типа «Линии» по столбцам A:B</text:p>
          </table:table-cell>
          <table:covered-table-cell table:style-name="u_cov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