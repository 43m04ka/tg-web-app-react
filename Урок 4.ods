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automatic-styles/>
  <office:body>
    <office:spreadsheet>
      <table:table table:name="Ассортимент товаров"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Информация о товарах" table:number-columns-spanned="6">
            <text:p>Информация о товара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/>
        <table:table-row>
          <table:table-cell office:value-type="string" office:string-value="Студент (ФИО):">
            <text:p>Студент (ФИО):</text:p>
          </table:table-cell>
          <table:table-cell office:value-type="string" office:string-value="Иванов И.И.">
            <text:p>Иванов И.И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Дата:">
            <text:p>Дата:</text:p>
          </table:table-cell>
          <table:table-cell office:value-type="date" office:date-value="2026-05-11" table:formula="of:=TODAY()">
            <text:p>11.05.20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/>
        <table:table-row>
          <table:table-cell office:value-type="string" office:string-value="Товар">
            <text:p>Товар</text:p>
          </table:table-cell>
          <table:table-cell office:value-type="string" office:string-value="Название">
            <text:p>Название</text:p>
          </table:table-cell>
          <table:table-cell office:value-type="string" office:string-value="Цена">
            <text:p>Цена</text:p>
          </table:table-cell>
          <table:table-cell office:value-type="string" office:string-value="Стоимость">
            <text:p>Стоимость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Сумма">
            <text:p>Сумма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Персональный">
            <text:p>Персональный</text:p>
          </table:table-cell>
          <table:table-cell office:value-type="float" office:value="2100.0">
            <text:p>2100,0</text:p>
          </table:table-cell>
          <table:table-cell office:value-type="float" office:value="2730.0" table:formula="of:=C7*1.3">
            <text:p>2730,0</text:p>
          </table:table-cell>
          <table:table-cell office:value-type="float" office:value="120.0">
            <text:p>120,0</text:p>
          </table:table-cell>
          <table:table-cell office:value-type="float" office:value="327600.0" table:formula="of:=D7*E7">
            <text:p>327600,0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Деловой">
            <text:p>Деловой</text:p>
          </table:table-cell>
          <table:table-cell office:value-type="float" office:value="1900.0">
            <text:p>1900,0</text:p>
          </table:table-cell>
          <table:table-cell office:value-type="float" office:value="2470.0" table:formula="of:=C8*1.3">
            <text:p>2470,0</text:p>
          </table:table-cell>
          <table:table-cell office:value-type="float" office:value="200.0">
            <text:p>200,0</text:p>
          </table:table-cell>
          <table:table-cell office:value-type="float" office:value="494000.0" table:formula="of:=D8*E8">
            <text:p>494000,0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Профессиональный">
            <text:p>Профессиональный</text:p>
          </table:table-cell>
          <table:table-cell office:value-type="float" office:value="4800.0">
            <text:p>4800,0</text:p>
          </table:table-cell>
          <table:table-cell office:value-type="float" office:value="6240.0" table:formula="of:=C9*1.3">
            <text:p>6240,0</text:p>
          </table:table-cell>
          <table:table-cell office:value-type="float" office:value="45.0">
            <text:p>45,0</text:p>
          </table:table-cell>
          <table:table-cell office:value-type="float" office:value="280800.0" table:formula="of:=D9*E9">
            <text:p>280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Персональный">
            <text:p>Персональный</text:p>
          </table:table-cell>
          <table:table-cell office:value-type="float" office:value="3200.0">
            <text:p>3200,0</text:p>
          </table:table-cell>
          <table:table-cell office:value-type="float" office:value="4160.0" table:formula="of:=C10*1.3">
            <text:p>4160,0</text:p>
          </table:table-cell>
          <table:table-cell office:value-type="float" office:value="80.0">
            <text:p>80,0</text:p>
          </table:table-cell>
          <table:table-cell office:value-type="float" office:value="332800.0" table:formula="of:=D10*E10">
            <text:p>332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Профессиональный">
            <text:p>Профессиональный</text:p>
          </table:table-cell>
          <table:table-cell office:value-type="float" office:value="4100.0">
            <text:p>4100,0</text:p>
          </table:table-cell>
          <table:table-cell office:value-type="float" office:value="5330.0" table:formula="of:=C11*1.3">
            <text:p>5330,0</text:p>
          </table:table-cell>
          <table:table-cell office:value-type="float" office:value="60.0">
            <text:p>60,0</text:p>
          </table:table-cell>
          <table:table-cell office:value-type="float" office:value="319800.0" table:formula="of:=D11*E11">
            <text:p>319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Деловой">
            <text:p>Деловой</text:p>
          </table:table-cell>
          <table:table-cell office:value-type="float" office:value="2750.0">
            <text:p>2750,0</text:p>
          </table:table-cell>
          <table:table-cell office:value-type="float" office:value="3575.0" table:formula="of:=C12*1.3">
            <text:p>3575,0</text:p>
          </table:table-cell>
          <table:table-cell office:value-type="float" office:value="150.0">
            <text:p>150,0</text:p>
          </table:table-cell>
          <table:table-cell office:value-type="float" office:value="536250.0" table:formula="of:=D12*E12">
            <text:p>536250,0</text:p>
          </table:table-cell>
        </table:table-row>
        <table:table-row>
          <table:table-cell office:value-type="string" office:string-value="Ксерокс">
            <text:p>Ксерокс</text:p>
          </table:table-cell>
          <table:table-cell office:value-type="string" office:string-value="Профессиональный Плюс">
            <text:p>Профессиональный Плюс</text:p>
          </table:table-cell>
          <table:table-cell office:value-type="float" office:value="5200.0">
            <text:p>5200,0</text:p>
          </table:table-cell>
          <table:table-cell office:value-type="float" office:value="6760.0" table:formula="of:=C13*1.3">
            <text:p>6760,0</text:p>
          </table:table-cell>
          <table:table-cell office:value-type="float" office:value="30.0">
            <text:p>30,0</text:p>
          </table:table-cell>
          <table:table-cell office:value-type="float" office:value="202800.0" table:formula="of:=D13*E13">
            <text:p>202800,0</text:p>
          </table:table-cell>
        </table:table-row>
        <table:table-row>
          <table:table-cell office:value-type="string" office:string-value="Факс">
            <text:p>Факс</text:p>
          </table:table-cell>
          <table:table-cell office:value-type="string" office:string-value="Профессиональный Плюс">
            <text:p>Профессиональный Плюс</text:p>
          </table:table-cell>
          <table:table-cell office:value-type="float" office:value="4550.0">
            <text:p>4550,0</text:p>
          </table:table-cell>
          <table:table-cell office:value-type="float" office:value="5915.0" table:formula="of:=C14*1.3">
            <text:p>5915,0</text:p>
          </table:table-cell>
          <table:table-cell office:value-type="float" office:value="25.0">
            <text:p>25,0</text:p>
          </table:table-cell>
          <table:table-cell office:value-type="float" office:value="147875.0" table:formula="of:=D14*E14">
            <text:p>147875,0</text:p>
          </table:table-cell>
        </table:table-row>
      </table:table>
      <table:table table:name="Ксероксы"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Продажа копировальной техники. Отчёт" table:number-columns-spanned="6">
            <text:p>Продажа копировальной техники. Отчё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/>
        <table:table-row>
          <table:table-cell office:value-type="string" office:string-value="Торговый агент">
            <text:p>Торговый агент</text:p>
          </table:table-cell>
          <table:table-cell office:value-type="string" office:string-value="№ филиала">
            <text:p>№ филиала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Цена (руб.)">
            <text:p>Цена (руб.)</text:p>
          </table:table-cell>
          <table:table-cell office:value-type="string" office:string-value="Выручка (руб.)">
            <text:p>Выручка (руб.)</text:p>
          </table:table-cell>
          <table:table-cell office:value-type="string" office:string-value="Доставка">
            <text:p>Доставка</text:p>
          </table:table-cell>
        </table:table-row>
        <table:table-row>
          <table:table-cell office:value-type="string" office:string-value="Андреев В.П.">
            <text:p>Андреев В.П.</text:p>
          </table:table-cell>
          <table:table-cell office:value-type="float" office:value="195.0">
            <text:p>195,0</text:p>
          </table:table-cell>
          <table:table-cell office:value-type="float" office:value="4.0">
            <text:p>4,0</text:p>
          </table:table-cell>
          <table:table-cell office:value-type="float" office:value="1200.0">
            <text:p>1200,0</text:p>
          </table:table-cell>
          <table:table-cell office:value-type="float" office:value="4800.0" table:formula="of:=C4*D4">
            <text:p>48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Борисов К.М.">
            <text:p>Борисов К.М.</text:p>
          </table:table-cell>
          <table:table-cell office:value-type="float" office:value="261.0">
            <text:p>261,0</text:p>
          </table:table-cell>
          <table:table-cell office:value-type="float" office:value="5.0">
            <text:p>5,0</text:p>
          </table:table-cell>
          <table:table-cell office:value-type="float" office:value="3500.0">
            <text:p>3500,0</text:p>
          </table:table-cell>
          <table:table-cell office:value-type="float" office:value="17500.0" table:formula="of:=C5*D5">
            <text:p>175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Волков А.С.">
            <text:p>Волков А.С.</text:p>
          </table:table-cell>
          <table:table-cell office:value-type="float" office:value="140.0">
            <text:p>140,0</text:p>
          </table:table-cell>
          <table:table-cell office:value-type="float" office:value="3.0">
            <text:p>3,0</text:p>
          </table:table-cell>
          <table:table-cell office:value-type="float" office:value="2800.0">
            <text:p>2800,0</text:p>
          </table:table-cell>
          <table:table-cell office:value-type="float" office:value="8400.0" table:formula="of:=C6*D6">
            <text:p>8400,0</text:p>
          </table:table-cell>
          <table:table-cell office:value-type="string" office:string-value="Авто">
            <text:p>Авто</text:p>
          </table:table-cell>
        </table:table-row>
        <table:table-row>
          <table:table-cell office:value-type="string" office:string-value="Громов Д.Л.">
            <text:p>Громов Д.Л.</text:p>
          </table:table-cell>
          <table:table-cell office:value-type="float" office:value="195.0">
            <text:p>195,0</text:p>
          </table:table-cell>
          <table:table-cell office:value-type="float" office:value="3.0">
            <text:p>3,0</text:p>
          </table:table-cell>
          <table:table-cell office:value-type="float" office:value="2500.0">
            <text:p>2500,0</text:p>
          </table:table-cell>
          <table:table-cell office:value-type="float" office:value="7500.0" table:formula="of:=C7*D7">
            <text:p>75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Дмитриев О.Н.">
            <text:p>Дмитриев О.Н.</text:p>
          </table:table-cell>
          <table:table-cell office:value-type="float" office:value="261.0">
            <text:p>261,0</text:p>
          </table:table-cell>
          <table:table-cell office:value-type="float" office:value="2.0">
            <text:p>2,0</text:p>
          </table:table-cell>
          <table:table-cell office:value-type="float" office:value="2900.0">
            <text:p>2900,0</text:p>
          </table:table-cell>
          <table:table-cell office:value-type="float" office:value="5800.0" table:formula="of:=C8*D8">
            <text:p>58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Егоров П.Р.">
            <text:p>Егоров П.Р.</text:p>
          </table:table-cell>
          <table:table-cell office:value-type="float" office:value="195.0">
            <text:p>195,0</text:p>
          </table:table-cell>
          <table:table-cell office:value-type="float" office:value="10.0">
            <text:p>10,0</text:p>
          </table:table-cell>
          <table:table-cell office:value-type="float" office:value="150.0">
            <text:p>150,0</text:p>
          </table:table-cell>
          <table:table-cell office:value-type="float" office:value="1500.0" table:formula="of:=C9*D9">
            <text:p>15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Жуков И.Т.">
            <text:p>Жуков И.Т.</text:p>
          </table:table-cell>
          <table:table-cell office:value-type="float" office:value="261.0">
            <text:p>261,0</text:p>
          </table:table-cell>
          <table:table-cell office:value-type="float" office:value="4.0">
            <text:p>4,0</text:p>
          </table:table-cell>
          <table:table-cell office:value-type="float" office:value="4200.0">
            <text:p>4200,0</text:p>
          </table:table-cell>
          <table:table-cell office:value-type="float" office:value="16800.0" table:formula="of:=C10*D10">
            <text:p>168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Зайцев В.Г.">
            <text:p>Зайцев В.Г.</text:p>
          </table:table-cell>
          <table:table-cell office:value-type="float" office:value="140.0">
            <text:p>140,0</text:p>
          </table:table-cell>
          <table:table-cell office:value-type="float" office:value="2.0">
            <text:p>2,0</text:p>
          </table:table-cell>
          <table:table-cell office:value-type="float" office:value="3100.0">
            <text:p>3100,0</text:p>
          </table:table-cell>
          <table:table-cell office:value-type="float" office:value="6200.0" table:formula="of:=C11*D11">
            <text:p>62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Иванов М.К.">
            <text:p>Иванов М.К.</text:p>
          </table:table-cell>
          <table:table-cell office:value-type="float" office:value="195.0">
            <text:p>195,0</text:p>
          </table:table-cell>
          <table:table-cell office:value-type="float" office:value="8.0">
            <text:p>8,0</text:p>
          </table:table-cell>
          <table:table-cell office:value-type="float" office:value="900.0">
            <text:p>900,0</text:p>
          </table:table-cell>
          <table:table-cell office:value-type="float" office:value="7200.0" table:formula="of:=C12*D12">
            <text:p>72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Козлов С.А.">
            <text:p>Козлов С.А.</text:p>
          </table:table-cell>
          <table:table-cell office:value-type="float" office:value="261.0">
            <text:p>261,0</text:p>
          </table:table-cell>
          <table:table-cell office:value-type="float" office:value="2.0">
            <text:p>2,0</text:p>
          </table:table-cell>
          <table:table-cell office:value-type="float" office:value="3100.0">
            <text:p>3100,0</text:p>
          </table:table-cell>
          <table:table-cell office:value-type="float" office:value="6200.0" table:formula="of:=C13*D13">
            <text:p>6200,0</text:p>
          </table:table-cell>
          <table:table-cell office:value-type="string" office:string-value="Ж/Д">
            <text:p>Ж/Д</text:p>
          </table:table-cell>
        </table:table-row>
        <table:table-row/>
        <table:table-row>
          <table:table-cell office:value-type="string" office:string-value="Отсортированная таблица (задание 4: агент по алфавиту, филиал по возрастанию)" table:number-columns-spanned="6">
            <text:p>Отсортированная таблица (задание 4: агент по алфавиту, филиал по возрастанию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office:string-value="Торговый агент">
            <text:p>Торговый агент</text:p>
          </table:table-cell>
          <table:table-cell office:value-type="string" office:string-value="№ филиала">
            <text:p>№ филиала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Цена (руб.)">
            <text:p>Цена (руб.)</text:p>
          </table:table-cell>
          <table:table-cell office:value-type="string" office:string-value="Выручка (руб.)">
            <text:p>Выручка (руб.)</text:p>
          </table:table-cell>
          <table:table-cell office:value-type="string" office:string-value="Доставка">
            <text:p>Доставка</text:p>
          </table:table-cell>
        </table:table-row>
        <table:table-row>
          <table:table-cell office:value-type="string" office:string-value="Андреев В.П.">
            <text:p>Андреев В.П.</text:p>
          </table:table-cell>
          <table:table-cell office:value-type="float" office:value="195.0">
            <text:p>195,0</text:p>
          </table:table-cell>
          <table:table-cell office:value-type="float" office:value="4.0">
            <text:p>4,0</text:p>
          </table:table-cell>
          <table:table-cell office:value-type="float" office:value="1200.0">
            <text:p>1200,0</text:p>
          </table:table-cell>
          <table:table-cell office:value-type="float" office:value="4800.0" table:formula="of:=C17*D17">
            <text:p>48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Борисов К.М.">
            <text:p>Борисов К.М.</text:p>
          </table:table-cell>
          <table:table-cell office:value-type="float" office:value="261.0">
            <text:p>261,0</text:p>
          </table:table-cell>
          <table:table-cell office:value-type="float" office:value="5.0">
            <text:p>5,0</text:p>
          </table:table-cell>
          <table:table-cell office:value-type="float" office:value="3500.0">
            <text:p>3500,0</text:p>
          </table:table-cell>
          <table:table-cell office:value-type="float" office:value="17500.0" table:formula="of:=C18*D18">
            <text:p>175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Волков А.С.">
            <text:p>Волков А.С.</text:p>
          </table:table-cell>
          <table:table-cell office:value-type="float" office:value="140.0">
            <text:p>140,0</text:p>
          </table:table-cell>
          <table:table-cell office:value-type="float" office:value="3.0">
            <text:p>3,0</text:p>
          </table:table-cell>
          <table:table-cell office:value-type="float" office:value="2800.0">
            <text:p>2800,0</text:p>
          </table:table-cell>
          <table:table-cell office:value-type="float" office:value="8400.0" table:formula="of:=C19*D19">
            <text:p>8400,0</text:p>
          </table:table-cell>
          <table:table-cell office:value-type="string" office:string-value="Авто">
            <text:p>Авто</text:p>
          </table:table-cell>
        </table:table-row>
        <table:table-row>
          <table:table-cell office:value-type="string" office:string-value="Громов Д.Л.">
            <text:p>Громов Д.Л.</text:p>
          </table:table-cell>
          <table:table-cell office:value-type="float" office:value="195.0">
            <text:p>195,0</text:p>
          </table:table-cell>
          <table:table-cell office:value-type="float" office:value="3.0">
            <text:p>3,0</text:p>
          </table:table-cell>
          <table:table-cell office:value-type="float" office:value="2500.0">
            <text:p>2500,0</text:p>
          </table:table-cell>
          <table:table-cell office:value-type="float" office:value="7500.0" table:formula="of:=C20*D20">
            <text:p>75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Дмитриев О.Н.">
            <text:p>Дмитриев О.Н.</text:p>
          </table:table-cell>
          <table:table-cell office:value-type="float" office:value="261.0">
            <text:p>261,0</text:p>
          </table:table-cell>
          <table:table-cell office:value-type="float" office:value="2.0">
            <text:p>2,0</text:p>
          </table:table-cell>
          <table:table-cell office:value-type="float" office:value="2900.0">
            <text:p>2900,0</text:p>
          </table:table-cell>
          <table:table-cell office:value-type="float" office:value="5800.0" table:formula="of:=C21*D21">
            <text:p>58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Егоров П.Р.">
            <text:p>Егоров П.Р.</text:p>
          </table:table-cell>
          <table:table-cell office:value-type="float" office:value="195.0">
            <text:p>195,0</text:p>
          </table:table-cell>
          <table:table-cell office:value-type="float" office:value="10.0">
            <text:p>10,0</text:p>
          </table:table-cell>
          <table:table-cell office:value-type="float" office:value="150.0">
            <text:p>150,0</text:p>
          </table:table-cell>
          <table:table-cell office:value-type="float" office:value="1500.0" table:formula="of:=C22*D22">
            <text:p>15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Жуков И.Т.">
            <text:p>Жуков И.Т.</text:p>
          </table:table-cell>
          <table:table-cell office:value-type="float" office:value="261.0">
            <text:p>261,0</text:p>
          </table:table-cell>
          <table:table-cell office:value-type="float" office:value="4.0">
            <text:p>4,0</text:p>
          </table:table-cell>
          <table:table-cell office:value-type="float" office:value="4200.0">
            <text:p>4200,0</text:p>
          </table:table-cell>
          <table:table-cell office:value-type="float" office:value="16800.0" table:formula="of:=C23*D23">
            <text:p>168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Зайцев В.Г.">
            <text:p>Зайцев В.Г.</text:p>
          </table:table-cell>
          <table:table-cell office:value-type="float" office:value="140.0">
            <text:p>140,0</text:p>
          </table:table-cell>
          <table:table-cell office:value-type="float" office:value="2.0">
            <text:p>2,0</text:p>
          </table:table-cell>
          <table:table-cell office:value-type="float" office:value="3100.0">
            <text:p>3100,0</text:p>
          </table:table-cell>
          <table:table-cell office:value-type="float" office:value="6200.0" table:formula="of:=C24*D24">
            <text:p>6200,0</text:p>
          </table:table-cell>
          <table:table-cell office:value-type="string" office:string-value="АВИА">
            <text:p>АВИА</text:p>
          </table:table-cell>
        </table:table-row>
        <table:table-row>
          <table:table-cell office:value-type="string" office:string-value="Иванов М.К.">
            <text:p>Иванов М.К.</text:p>
          </table:table-cell>
          <table:table-cell office:value-type="float" office:value="195.0">
            <text:p>195,0</text:p>
          </table:table-cell>
          <table:table-cell office:value-type="float" office:value="8.0">
            <text:p>8,0</text:p>
          </table:table-cell>
          <table:table-cell office:value-type="float" office:value="900.0">
            <text:p>900,0</text:p>
          </table:table-cell>
          <table:table-cell office:value-type="float" office:value="7200.0" table:formula="of:=C25*D25">
            <text:p>72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Козлов С.А.">
            <text:p>Козлов С.А.</text:p>
          </table:table-cell>
          <table:table-cell office:value-type="float" office:value="261.0">
            <text:p>261,0</text:p>
          </table:table-cell>
          <table:table-cell office:value-type="float" office:value="2.0">
            <text:p>2,0</text:p>
          </table:table-cell>
          <table:table-cell office:value-type="float" office:value="3100.0">
            <text:p>3100,0</text:p>
          </table:table-cell>
          <table:table-cell office:value-type="float" office:value="6200.0" table:formula="of:=C26*D26">
            <text:p>6200,0</text:p>
          </table:table-cell>
          <table:table-cell office:value-type="string" office:string-value="Ж/Д">
            <text:p>Ж/Д</text:p>
          </table:table-cell>
        </table:table-row>
        <table:table-row/>
        <table:table-row>
          <table:table-cell office:value-type="string" office:string-value="Филиал 261, цена единицы свыше 3000 руб. (задание 6)" table:number-columns-spanned="6">
            <text:p>Филиал 261, цена единицы свыше 3000 руб. (задание 6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office:string-value="Торговый агент">
            <text:p>Торговый агент</text:p>
          </table:table-cell>
          <table:table-cell office:value-type="string" office:string-value="№ филиала">
            <text:p>№ филиала</text:p>
          </table:table-cell>
          <table:table-cell office:value-type="string" office:string-value="Количество">
            <text:p>Количество</text:p>
          </table:table-cell>
          <table:table-cell office:value-type="string" office:string-value="Цена (руб.)">
            <text:p>Цена (руб.)</text:p>
          </table:table-cell>
          <table:table-cell office:value-type="string" office:string-value="Выручка (руб.)">
            <text:p>Выручка (руб.)</text:p>
          </table:table-cell>
          <table:table-cell office:value-type="string" office:string-value="Доставка">
            <text:p>Доставка</text:p>
          </table:table-cell>
        </table:table-row>
        <table:table-row>
          <table:table-cell office:value-type="string" office:string-value="Борисов К.М.">
            <text:p>Борисов К.М.</text:p>
          </table:table-cell>
          <table:table-cell office:value-type="float" office:value="261.0">
            <text:p>261,0</text:p>
          </table:table-cell>
          <table:table-cell office:value-type="float" office:value="5.0">
            <text:p>5,0</text:p>
          </table:table-cell>
          <table:table-cell office:value-type="float" office:value="3500.0">
            <text:p>3500,0</text:p>
          </table:table-cell>
          <table:table-cell office:value-type="float" office:value="17500.0" table:formula="of:=C30*D30">
            <text:p>175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Жуков И.Т.">
            <text:p>Жуков И.Т.</text:p>
          </table:table-cell>
          <table:table-cell office:value-type="float" office:value="261.0">
            <text:p>261,0</text:p>
          </table:table-cell>
          <table:table-cell office:value-type="float" office:value="4.0">
            <text:p>4,0</text:p>
          </table:table-cell>
          <table:table-cell office:value-type="float" office:value="4200.0">
            <text:p>4200,0</text:p>
          </table:table-cell>
          <table:table-cell office:value-type="float" office:value="16800.0" table:formula="of:=C31*D31">
            <text:p>16800,0</text:p>
          </table:table-cell>
          <table:table-cell office:value-type="string" office:string-value="Ж/Д">
            <text:p>Ж/Д</text:p>
          </table:table-cell>
        </table:table-row>
        <table:table-row>
          <table:table-cell office:value-type="string" office:string-value="Козлов С.А.">
            <text:p>Козлов С.А.</text:p>
          </table:table-cell>
          <table:table-cell office:value-type="float" office:value="261.0">
            <text:p>261,0</text:p>
          </table:table-cell>
          <table:table-cell office:value-type="float" office:value="2.0">
            <text:p>2,0</text:p>
          </table:table-cell>
          <table:table-cell office:value-type="float" office:value="3100.0">
            <text:p>3100,0</text:p>
          </table:table-cell>
          <table:table-cell office:value-type="float" office:value="6200.0" table:formula="of:=C32*D32">
            <text:p>6200,0</text:p>
          </table:table-cell>
          <table:table-cell office:value-type="string" office:string-value="Ж/Д">
            <text:p>Ж/Д</text:p>
          </table:table-cell>
        </table:table-row>
        <table:table-row/>
        <table:table-row>
          <table:table-cell office:value-type="string" office:string-value="Критерии расширенного фильтра (задание 7)" table:number-columns-spanned="6">
            <text:p>Критерии расширенного фильтра (задание 7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office:string-value="№ филиала">
            <text:p>№ филиала</text:p>
          </table:table-cell>
          <table:table-cell office:value-type="string" office:string-value="Выручка (руб.)">
            <text:p>Выручка (руб.)</text:p>
          </table:table-cell>
          <table:table-cell office:value-type="string" office:string-value="Выручка (руб.)">
            <text:p>Выручка (руб.)</text:p>
          </table:table-cell>
          <table:table-cell office:value-type="string" office:string-value="Доставка">
            <text:p>Доставка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 office:string-value="&gt;1000">
            <text:p>&gt;1000</text:p>
          </table:table-cell>
          <table:table-cell office:value-type="string" office:string-value="&lt;10000">
            <text:p>&lt;10000</text:p>
          </table:table-cell>
          <table:table-cell office:value-type="string" office:string-value="АВИА">
            <text:p>АВИА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 office:string-value="&gt;10000">
            <text:p>&gt;10000</text:p>
          </table:table-cell>
          <table:table-cell office:value-type="string" office:string-value="">
            <text:p/>
          </table:table-cell>
          <table:table-cell office:value-type="string" office:string-value="Ж/Д">
            <text:p>Ж/Д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