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automatic-styles>
    <style:style style:name="ce_title" style:family="table-cell" style:parent-style-name="Default" style:display-name="ce_title">
      <style:table-cell-properties fo:border="0.06pt solid #000000" style:vertical-align="middle"/>
      <style:paragraph-properties fo:text-align="center"/>
      <style:text-properties fo:font-weight="bold" fo:font-family="Arial"/>
    </style:style>
    <style:style style:name="ce_hdr_yellow" style:family="table-cell" style:parent-style-name="Default" style:display-name="ce_hdr_yellow">
      <style:table-cell-properties fo:border="0.06pt solid #000000" style:vertical-align="middle" fo:background-color="#fff2cc"/>
      <style:paragraph-properties fo:text-align="center"/>
      <style:text-properties fo:font-weight="bold" fo:font-family="Arial"/>
    </style:style>
    <style:style style:name="ce_txt" style:family="table-cell" style:parent-style-name="Default" style:display-name="ce_txt">
      <style:table-cell-properties fo:border="0.06pt solid #000000" style:vertical-align="middle"/>
      <style:paragraph-properties fo:text-align="start"/>
      <style:text-properties fo:font-family="Arial"/>
    </style:style>
    <style:style style:name="ce_num" style:family="table-cell" style:parent-style-name="Default" style:display-name="ce_num">
      <style:table-cell-properties fo:border="0.06pt solid #000000" style:vertical-align="middle"/>
      <style:paragraph-properties fo:text-align="end"/>
      <style:text-properties fo:font-family="Arial"/>
    </style:style>
    <style:style style:name="ks_title" style:family="table-cell" style:parent-style-name="Default" style:display-name="ks_title">
      <style:table-cell-properties fo:border="0.06pt solid #000000" style:vertical-align="middle"/>
      <style:paragraph-properties fo:text-align="center"/>
      <style:text-properties fo:font-weight="bold" fo:font-family="Arial"/>
    </style:style>
    <style:style style:name="ks_hdr_gray" style:family="table-cell" style:parent-style-name="Default" style:display-name="ks_hdr_gray">
      <style:table-cell-properties fo:border="0.06pt solid #000000" style:vertical-align="middle" fo:background-color="#d9d9d9"/>
      <style:paragraph-properties fo:text-align="center"/>
      <style:text-properties fo:font-weight="bold" fo:font-family="Arial"/>
    </style:style>
    <style:style style:name="ks_td_agent" style:family="table-cell" style:parent-style-name="Default" style:display-name="ks_td_agent">
      <style:table-cell-properties fo:border="0.06pt solid #000000" style:vertical-align="middle"/>
      <style:paragraph-properties fo:text-align="start"/>
      <style:text-properties fo:font-family="Arial"/>
    </style:style>
    <style:style style:name="ks_td_center" style:family="table-cell" style:parent-style-name="Default" style:display-name="ks_td_center">
      <style:table-cell-properties fo:border="0.06pt solid #000000" style:vertical-align="middle"/>
      <style:paragraph-properties fo:text-align="center"/>
      <style:text-properties fo:font-family="Arial"/>
    </style:style>
    <style:style style:name="ks_td_num" style:family="table-cell" style:parent-style-name="Default" style:display-name="ks_td_num">
      <style:table-cell-properties fo:border="0.06pt solid #000000" style:vertical-align="middle"/>
      <style:paragraph-properties fo:text-align="end"/>
      <style:text-properties fo:font-family="Arial"/>
    </style:style>
    <style:style style:name="ks_covered" style:family="table-cell" style:parent-style-name="Default" style:display-name="ks_covered">
      <style:table-cell-properties fo:border="0.06pt solid #000000" style:vertical-align="middle"/>
      <style:paragraph-properties fo:text-align="center"/>
      <style:text-properties fo:font-family="Arial"/>
    </style:style>
    <style:style style:name="ks_block_title" style:family="table-cell" style:parent-style-name="Default" style:display-name="ks_block_title">
      <style:table-cell-properties fo:border="0.06pt solid #000000" style:vertical-align="middle"/>
      <style:paragraph-properties fo:text-align="center"/>
      <style:text-properties fo:font-weight="bold" fo:font-family="Arial"/>
    </style:style>
  </office:automatic-styles>
  <office:body>
    <office:spreadsheet>
      <table:table table:name="Ассортимент товаров"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Информация о товарах" table:number-columns-spanned="6" table:style-name="ce_title">
            <text:p>Информация о товарах</text:p>
          </table:table-cell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</table:table-row>
        <table:table-row/>
        <table:table-row>
          <table:table-cell office:value-type="string" office:string-value="Студент (ФИО):" table:style-name="ce_txt">
            <text:p>Студент (ФИО):</text:p>
          </table:table-cell>
          <table:table-cell office:value-type="string" office:string-value="Иванов И.И." table:style-name="ce_txt">
            <text:p>Иванов И.И.</text:p>
          </table:table-cell>
          <table:table-cell office:value-type="string" office:string-value="" table:style-name="ce_txt">
            <text:p/>
          </table:table-cell>
          <table:table-cell office:value-type="string" office:string-value="" table:style-name="ce_txt">
            <text:p/>
          </table:table-cell>
          <table:table-cell office:value-type="string" office:string-value="" table:style-name="ce_txt">
            <text:p/>
          </table:table-cell>
          <table:table-cell office:value-type="string" office:string-value="" table:style-name="ce_txt">
            <text:p/>
          </table:table-cell>
        </table:table-row>
        <table:table-row>
          <table:table-cell office:value-type="string" office:string-value="Дата:" table:style-name="ce_txt">
            <text:p>Дата:</text:p>
          </table:table-cell>
          <table:table-cell office:value-type="date" office:date-value="2026-05-11" table:formula="of:=TODAY()" table:style-name="ce_txt">
            <text:p>11.05.2026</text:p>
          </table:table-cell>
          <table:table-cell office:value-type="string" office:string-value="" table:style-name="ce_txt">
            <text:p/>
          </table:table-cell>
          <table:table-cell office:value-type="string" office:string-value="" table:style-name="ce_txt">
            <text:p/>
          </table:table-cell>
          <table:table-cell office:value-type="string" office:string-value="" table:style-name="ce_txt">
            <text:p/>
          </table:table-cell>
          <table:table-cell office:value-type="string" office:string-value="" table:style-name="ce_txt">
            <text:p/>
          </table:table-cell>
        </table:table-row>
        <table:table-row/>
        <table:table-row>
          <table:table-cell office:value-type="string" office:string-value="Товар" table:style-name="ce_hdr_yellow">
            <text:p>Товар</text:p>
          </table:table-cell>
          <table:table-cell office:value-type="string" office:string-value="Название" table:style-name="ce_hdr_yellow">
            <text:p>Название</text:p>
          </table:table-cell>
          <table:table-cell office:value-type="string" office:string-value="Цена" table:style-name="ce_hdr_yellow">
            <text:p>Цена</text:p>
          </table:table-cell>
          <table:table-cell office:value-type="string" office:string-value="Стоимость" table:style-name="ce_hdr_yellow">
            <text:p>Стоимость</text:p>
          </table:table-cell>
          <table:table-cell office:value-type="string" office:string-value="Количество" table:style-name="ce_hdr_yellow">
            <text:p>Количество</text:p>
          </table:table-cell>
          <table:table-cell office:value-type="string" office:string-value="Сумма" table:style-name="ce_hdr_yellow">
            <text:p>Сумма</text:p>
          </table:table-cell>
        </table:table-row>
        <table:table-row>
          <table:table-cell office:value-type="string" office:string-value="Ксерокс" table:style-name="ce_txt">
            <text:p>Ксерокс</text:p>
          </table:table-cell>
          <table:table-cell office:value-type="string" office:string-value="Персональный" table:style-name="ce_txt">
            <text:p>Персональный</text:p>
          </table:table-cell>
          <table:table-cell office:value-type="float" office:value="2100.0" table:style-name="ce_num">
            <text:p>2100,0</text:p>
          </table:table-cell>
          <table:table-cell office:value-type="float" office:value="2730.0" table:formula="of:=C7*1.3" table:style-name="ce_num">
            <text:p>2730,0</text:p>
          </table:table-cell>
          <table:table-cell office:value-type="float" office:value="120.0" table:style-name="ce_num">
            <text:p>120,0</text:p>
          </table:table-cell>
          <table:table-cell office:value-type="float" office:value="327600.0" table:formula="of:=D7*E7" table:style-name="ce_num">
            <text:p>327600,0</text:p>
          </table:table-cell>
        </table:table-row>
        <table:table-row>
          <table:table-cell office:value-type="string" office:string-value="Ксерокс" table:style-name="ce_txt">
            <text:p>Ксерокс</text:p>
          </table:table-cell>
          <table:table-cell office:value-type="string" office:string-value="Деловой" table:style-name="ce_txt">
            <text:p>Деловой</text:p>
          </table:table-cell>
          <table:table-cell office:value-type="float" office:value="1900.0" table:style-name="ce_num">
            <text:p>1900,0</text:p>
          </table:table-cell>
          <table:table-cell office:value-type="float" office:value="2470.0" table:formula="of:=C8*1.3" table:style-name="ce_num">
            <text:p>2470,0</text:p>
          </table:table-cell>
          <table:table-cell office:value-type="float" office:value="200.0" table:style-name="ce_num">
            <text:p>200,0</text:p>
          </table:table-cell>
          <table:table-cell office:value-type="float" office:value="494000.0" table:formula="of:=D8*E8" table:style-name="ce_num">
            <text:p>494000,0</text:p>
          </table:table-cell>
        </table:table-row>
        <table:table-row>
          <table:table-cell office:value-type="string" office:string-value="Ксерокс" table:style-name="ce_txt">
            <text:p>Ксерокс</text:p>
          </table:table-cell>
          <table:table-cell office:value-type="string" office:string-value="Профессиональный" table:style-name="ce_txt">
            <text:p>Профессиональный</text:p>
          </table:table-cell>
          <table:table-cell office:value-type="float" office:value="4800.0" table:style-name="ce_num">
            <text:p>4800,0</text:p>
          </table:table-cell>
          <table:table-cell office:value-type="float" office:value="6240.0" table:formula="of:=C9*1.3" table:style-name="ce_num">
            <text:p>6240,0</text:p>
          </table:table-cell>
          <table:table-cell office:value-type="float" office:value="45.0" table:style-name="ce_num">
            <text:p>45,0</text:p>
          </table:table-cell>
          <table:table-cell office:value-type="float" office:value="280800.0" table:formula="of:=D9*E9" table:style-name="ce_num">
            <text:p>280800,0</text:p>
          </table:table-cell>
        </table:table-row>
        <table:table-row>
          <table:table-cell office:value-type="string" office:string-value="Факс" table:style-name="ce_txt">
            <text:p>Факс</text:p>
          </table:table-cell>
          <table:table-cell office:value-type="string" office:string-value="Персональный" table:style-name="ce_txt">
            <text:p>Персональный</text:p>
          </table:table-cell>
          <table:table-cell office:value-type="float" office:value="3200.0" table:style-name="ce_num">
            <text:p>3200,0</text:p>
          </table:table-cell>
          <table:table-cell office:value-type="float" office:value="4160.0" table:formula="of:=C10*1.3" table:style-name="ce_num">
            <text:p>4160,0</text:p>
          </table:table-cell>
          <table:table-cell office:value-type="float" office:value="80.0" table:style-name="ce_num">
            <text:p>80,0</text:p>
          </table:table-cell>
          <table:table-cell office:value-type="float" office:value="332800.0" table:formula="of:=D10*E10" table:style-name="ce_num">
            <text:p>332800,0</text:p>
          </table:table-cell>
        </table:table-row>
        <table:table-row>
          <table:table-cell office:value-type="string" office:string-value="Факс" table:style-name="ce_txt">
            <text:p>Факс</text:p>
          </table:table-cell>
          <table:table-cell office:value-type="string" office:string-value="Профессиональный" table:style-name="ce_txt">
            <text:p>Профессиональный</text:p>
          </table:table-cell>
          <table:table-cell office:value-type="float" office:value="4100.0" table:style-name="ce_num">
            <text:p>4100,0</text:p>
          </table:table-cell>
          <table:table-cell office:value-type="float" office:value="5330.0" table:formula="of:=C11*1.3" table:style-name="ce_num">
            <text:p>5330,0</text:p>
          </table:table-cell>
          <table:table-cell office:value-type="float" office:value="60.0" table:style-name="ce_num">
            <text:p>60,0</text:p>
          </table:table-cell>
          <table:table-cell office:value-type="float" office:value="319800.0" table:formula="of:=D11*E11" table:style-name="ce_num">
            <text:p>319800,0</text:p>
          </table:table-cell>
        </table:table-row>
        <table:table-row>
          <table:table-cell office:value-type="string" office:string-value="Факс" table:style-name="ce_txt">
            <text:p>Факс</text:p>
          </table:table-cell>
          <table:table-cell office:value-type="string" office:string-value="Деловой" table:style-name="ce_txt">
            <text:p>Деловой</text:p>
          </table:table-cell>
          <table:table-cell office:value-type="float" office:value="2750.0" table:style-name="ce_num">
            <text:p>2750,0</text:p>
          </table:table-cell>
          <table:table-cell office:value-type="float" office:value="3575.0" table:formula="of:=C12*1.3" table:style-name="ce_num">
            <text:p>3575,0</text:p>
          </table:table-cell>
          <table:table-cell office:value-type="float" office:value="150.0" table:style-name="ce_num">
            <text:p>150,0</text:p>
          </table:table-cell>
          <table:table-cell office:value-type="float" office:value="536250.0" table:formula="of:=D12*E12" table:style-name="ce_num">
            <text:p>536250,0</text:p>
          </table:table-cell>
        </table:table-row>
        <table:table-row>
          <table:table-cell office:value-type="string" office:string-value="Ксерокс" table:style-name="ce_txt">
            <text:p>Ксерокс</text:p>
          </table:table-cell>
          <table:table-cell office:value-type="string" office:string-value="Профессиональный Плюс" table:style-name="ce_txt">
            <text:p>Профессиональный Плюс</text:p>
          </table:table-cell>
          <table:table-cell office:value-type="float" office:value="5200.0" table:style-name="ce_num">
            <text:p>5200,0</text:p>
          </table:table-cell>
          <table:table-cell office:value-type="float" office:value="6760.0" table:formula="of:=C13*1.3" table:style-name="ce_num">
            <text:p>6760,0</text:p>
          </table:table-cell>
          <table:table-cell office:value-type="float" office:value="30.0" table:style-name="ce_num">
            <text:p>30,0</text:p>
          </table:table-cell>
          <table:table-cell office:value-type="float" office:value="202800.0" table:formula="of:=D13*E13" table:style-name="ce_num">
            <text:p>202800,0</text:p>
          </table:table-cell>
        </table:table-row>
        <table:table-row>
          <table:table-cell office:value-type="string" office:string-value="Факс" table:style-name="ce_txt">
            <text:p>Факс</text:p>
          </table:table-cell>
          <table:table-cell office:value-type="string" office:string-value="Профессиональный Плюс" table:style-name="ce_txt">
            <text:p>Профессиональный Плюс</text:p>
          </table:table-cell>
          <table:table-cell office:value-type="float" office:value="4550.0" table:style-name="ce_num">
            <text:p>4550,0</text:p>
          </table:table-cell>
          <table:table-cell office:value-type="float" office:value="5915.0" table:formula="of:=C14*1.3" table:style-name="ce_num">
            <text:p>5915,0</text:p>
          </table:table-cell>
          <table:table-cell office:value-type="float" office:value="25.0" table:style-name="ce_num">
            <text:p>25,0</text:p>
          </table:table-cell>
          <table:table-cell office:value-type="float" office:value="147875.0" table:formula="of:=D14*E14" table:style-name="ce_num">
            <text:p>147875,0</text:p>
          </table:table-cell>
        </table:table-row>
      </table:table>
      <table:table table:name="Ксероксы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Продажа копировальной техники. Отчёт" table:number-columns-spanned="7" table:style-name="ks_title">
            <text:p>Продажа копировальной техники. Отчёт</text:p>
          </table:table-cell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</table:table-row>
        <table:table-row>
          <table:table-cell office:value-type="string" office:string-value="Торговый агент" table:style-name="ks_hdr_gray">
            <text:p>Торговый агент</text:p>
          </table:table-cell>
          <table:table-cell office:value-type="string" office:string-value="Филиал" table:style-name="ks_hdr_gray">
            <text:p>Филиал</text:p>
          </table:table-cell>
          <table:table-cell office:value-type="string" office:string-value="Модель" table:style-name="ks_hdr_gray">
            <text:p>Модель</text:p>
          </table:table-cell>
          <table:table-cell office:value-type="string" office:string-value="Количество" table:style-name="ks_hdr_gray">
            <text:p>Количество</text:p>
          </table:table-cell>
          <table:table-cell office:value-type="string" office:string-value="Цена" table:style-name="ks_hdr_gray">
            <text:p>Цена</text:p>
          </table:table-cell>
          <table:table-cell office:value-type="string" office:string-value="Выручка" table:style-name="ks_hdr_gray">
            <text:p>Выручка</text:p>
          </table:table-cell>
          <table:table-cell office:value-type="string" office:string-value="Доставка" table:style-name="ks_hdr_gray">
            <text:p>Доставка</text:p>
          </table:table-cell>
        </table:table-row>
        <table:table-row>
          <table:table-cell office:value-type="string" office:string-value="Белкин Семён" table:style-name="ks_td_agent">
            <text:p>Белкин Семён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250GLS" table:style-name="ks_td_center">
            <text:p>C250GLS</text:p>
          </table:table-cell>
          <table:table-cell office:value-type="float" office:value="6.0" table:style-name="ks_td_center">
            <text:p>6,0</text:p>
          </table:table-cell>
          <table:table-cell office:value-type="float" office:value="4620.8" table:style-name="ks_td_num">
            <text:p>4620,8</text:p>
          </table:table-cell>
          <table:table-cell office:value-type="float" office:value="27724.8" table:formula="of:=D3*E3" table:style-name="ks_td_num">
            <text:p>27724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Белкин Семён" table:style-name="ks_td_agent">
            <text:p>Белкин Семён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100GLS" table:style-name="ks_td_center">
            <text:p>C10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1289.6" table:style-name="ks_td_num">
            <text:p>1289,6</text:p>
          </table:table-cell>
          <table:table-cell office:value-type="float" office:value="2579.2" table:formula="of:=D4*E4" table:style-name="ks_td_num">
            <text:p>2579,2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5.0" table:style-name="ks_td_center">
            <text:p>5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16044.5" table:formula="of:=D5*E5" table:style-name="ks_td_num">
            <text:p>16044,5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100GLS" table:style-name="ks_td_center">
            <text:p>C100GLS</text:p>
          </table:table-cell>
          <table:table-cell office:value-type="float" office:value="9.0" table:style-name="ks_td_center">
            <text:p>9,0</text:p>
          </table:table-cell>
          <table:table-cell office:value-type="float" office:value="1074.7" table:style-name="ks_td_num">
            <text:p>1074,7</text:p>
          </table:table-cell>
          <table:table-cell office:value-type="float" office:value="9672.3" table:formula="of:=D6*E6" table:style-name="ks_td_num">
            <text:p>9672,3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6417.8" table:formula="of:=D7*E7" table:style-name="ks_td_num">
            <text:p>6417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атвиенко Пётр" table:style-name="ks_td_agent">
            <text:p>Матвиенко Пётр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500GLS" table:style-name="ks_td_center">
            <text:p>C500GLS</text:p>
          </table:table-cell>
          <table:table-cell office:value-type="float" office:value="4.0" table:style-name="ks_td_center">
            <text:p>4,0</text:p>
          </table:table-cell>
          <table:table-cell office:value-type="float" office:value="1149.8" table:style-name="ks_td_num">
            <text:p>1149,8</text:p>
          </table:table-cell>
          <table:table-cell office:value-type="float" office:value="4599.2" table:formula="of:=D8*E8" table:style-name="ks_td_num">
            <text:p>4599,2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Матвиенко Пётр" table:style-name="ks_td_agent">
            <text:p>Матвиенко Пёт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150GLS" table:style-name="ks_td_center">
            <text:p>C150GLS</text:p>
          </table:table-cell>
          <table:table-cell office:value-type="float" office:value="3.0" table:style-name="ks_td_center">
            <text:p>3,0</text:p>
          </table:table-cell>
          <table:table-cell office:value-type="float" office:value="1547.5" table:style-name="ks_td_num">
            <text:p>1547,5</text:p>
          </table:table-cell>
          <table:table-cell office:value-type="float" office:value="4642.5" table:formula="of:=D9*E9" table:style-name="ks_td_num">
            <text:p>4642,5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атвиенко Пётр" table:style-name="ks_td_agent">
            <text:p>Матвиенко Пётр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250GLS" table:style-name="ks_td_center">
            <text:p>C25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4620.8" table:style-name="ks_td_num">
            <text:p>4620,8</text:p>
          </table:table-cell>
          <table:table-cell office:value-type="float" office:value="9241.6" table:formula="of:=D10*E10" table:style-name="ks_td_num">
            <text:p>9241,6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Сергеев Максим" table:style-name="ks_td_agent">
            <text:p>Сергеев Максим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400GLS" table:style-name="ks_td_center">
            <text:p>C400GLS</text:p>
          </table:table-cell>
          <table:table-cell office:value-type="float" office:value="8.0" table:style-name="ks_td_center">
            <text:p>8,0</text:p>
          </table:table-cell>
          <table:table-cell office:value-type="float" office:value="5545.0" table:style-name="ks_td_num">
            <text:p>5545,0</text:p>
          </table:table-cell>
          <table:table-cell office:value-type="float" office:value="44360.0" table:formula="of:=D11*E11" table:style-name="ks_td_num">
            <text:p>44360,0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Сергеев Максим" table:style-name="ks_td_agent">
            <text:p>Сергеев Максим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150GLS" table:style-name="ks_td_center">
            <text:p>C150GLS</text:p>
          </table:table-cell>
          <table:table-cell office:value-type="float" office:value="3.0" table:style-name="ks_td_center">
            <text:p>3,0</text:p>
          </table:table-cell>
          <table:table-cell office:value-type="float" office:value="1547.5" table:style-name="ks_td_num">
            <text:p>1547,5</text:p>
          </table:table-cell>
          <table:table-cell office:value-type="float" office:value="4642.5" table:formula="of:=D12*E12" table:style-name="ks_td_num">
            <text:p>4642,5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500GLS" table:style-name="ks_td_center">
            <text:p>C500GLS</text:p>
          </table:table-cell>
          <table:table-cell office:value-type="float" office:value="1.0" table:style-name="ks_td_center">
            <text:p>1,0</text:p>
          </table:table-cell>
          <table:table-cell office:value-type="float" office:value="1149.8" table:style-name="ks_td_num">
            <text:p>1149,8</text:p>
          </table:table-cell>
          <table:table-cell office:value-type="float" office:value="1149.8" table:formula="of:=D13*E13" table:style-name="ks_td_num">
            <text:p>1149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200GLS" table:style-name="ks_td_center">
            <text:p>C200GLS</text:p>
          </table:table-cell>
          <table:table-cell office:value-type="float" office:value="6.0" table:style-name="ks_td_center">
            <text:p>6,0</text:p>
          </table:table-cell>
          <table:table-cell office:value-type="float" office:value="1547.5" table:style-name="ks_td_num">
            <text:p>1547,5</text:p>
          </table:table-cell>
          <table:table-cell office:value-type="float" office:value="9285.0" table:formula="of:=D14*E14" table:style-name="ks_td_num">
            <text:p>9285,0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5.0" table:style-name="ks_td_center">
            <text:p>5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16044.5" table:formula="of:=D15*E15" table:style-name="ks_td_num">
            <text:p>16044,5</text:p>
          </table:table-cell>
          <table:table-cell office:value-type="string" office:string-value="Ж/Д" table:style-name="ks_td_center">
            <text:p>Ж/Д</text:p>
          </table:table-cell>
        </table:table-row>
        <table:table-row/>
        <table:table-row>
          <table:table-cell office:value-type="string" office:string-value="Отсортированная таблица (задание 4: агент по алфавиту, филиал по возрастанию)" table:number-columns-spanned="7" table:style-name="ks_block_title">
            <text:p>Отсортированная таблица (задание 4: агент по алфавиту, филиал по возрастанию)</text:p>
          </table:table-cell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</table:table-row>
        <table:table-row>
          <table:table-cell office:value-type="string" office:string-value="Торговый агент" table:style-name="ks_hdr_gray">
            <text:p>Торговый агент</text:p>
          </table:table-cell>
          <table:table-cell office:value-type="string" office:string-value="Филиал" table:style-name="ks_hdr_gray">
            <text:p>Филиал</text:p>
          </table:table-cell>
          <table:table-cell office:value-type="string" office:string-value="Модель" table:style-name="ks_hdr_gray">
            <text:p>Модель</text:p>
          </table:table-cell>
          <table:table-cell office:value-type="string" office:string-value="Количество" table:style-name="ks_hdr_gray">
            <text:p>Количество</text:p>
          </table:table-cell>
          <table:table-cell office:value-type="string" office:string-value="Цена" table:style-name="ks_hdr_gray">
            <text:p>Цена</text:p>
          </table:table-cell>
          <table:table-cell office:value-type="string" office:string-value="Выручка" table:style-name="ks_hdr_gray">
            <text:p>Выручка</text:p>
          </table:table-cell>
          <table:table-cell office:value-type="string" office:string-value="Доставка" table:style-name="ks_hdr_gray">
            <text:p>Доставка</text:p>
          </table:table-cell>
        </table:table-row>
        <table:table-row>
          <table:table-cell office:value-type="string" office:string-value="Белкин Семён" table:style-name="ks_td_agent">
            <text:p>Белкин Семён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100GLS" table:style-name="ks_td_center">
            <text:p>C10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1289.6" table:style-name="ks_td_num">
            <text:p>1289,6</text:p>
          </table:table-cell>
          <table:table-cell office:value-type="float" office:value="2579.2" table:formula="of:=D19*E19" table:style-name="ks_td_num">
            <text:p>2579,2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Белкин Семён" table:style-name="ks_td_agent">
            <text:p>Белкин Семён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250GLS" table:style-name="ks_td_center">
            <text:p>C250GLS</text:p>
          </table:table-cell>
          <table:table-cell office:value-type="float" office:value="6.0" table:style-name="ks_td_center">
            <text:p>6,0</text:p>
          </table:table-cell>
          <table:table-cell office:value-type="float" office:value="4620.8" table:style-name="ks_td_num">
            <text:p>4620,8</text:p>
          </table:table-cell>
          <table:table-cell office:value-type="float" office:value="27724.8" table:formula="of:=D20*E20" table:style-name="ks_td_num">
            <text:p>27724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200GLS" table:style-name="ks_td_center">
            <text:p>C200GLS</text:p>
          </table:table-cell>
          <table:table-cell office:value-type="float" office:value="6.0" table:style-name="ks_td_center">
            <text:p>6,0</text:p>
          </table:table-cell>
          <table:table-cell office:value-type="float" office:value="1547.5" table:style-name="ks_td_num">
            <text:p>1547,5</text:p>
          </table:table-cell>
          <table:table-cell office:value-type="float" office:value="9285.0" table:formula="of:=D21*E21" table:style-name="ks_td_num">
            <text:p>9285,0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5.0" table:style-name="ks_td_center">
            <text:p>5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16044.5" table:formula="of:=D22*E22" table:style-name="ks_td_num">
            <text:p>16044,5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500GLS" table:style-name="ks_td_center">
            <text:p>C500GLS</text:p>
          </table:table-cell>
          <table:table-cell office:value-type="float" office:value="1.0" table:style-name="ks_td_center">
            <text:p>1,0</text:p>
          </table:table-cell>
          <table:table-cell office:value-type="float" office:value="1149.8" table:style-name="ks_td_num">
            <text:p>1149,8</text:p>
          </table:table-cell>
          <table:table-cell office:value-type="float" office:value="1149.8" table:formula="of:=D23*E23" table:style-name="ks_td_num">
            <text:p>1149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атвиенко Пётр" table:style-name="ks_td_agent">
            <text:p>Матвиенко Пётр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250GLS" table:style-name="ks_td_center">
            <text:p>C25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4620.8" table:style-name="ks_td_num">
            <text:p>4620,8</text:p>
          </table:table-cell>
          <table:table-cell office:value-type="float" office:value="9241.6" table:formula="of:=D24*E24" table:style-name="ks_td_num">
            <text:p>9241,6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атвиенко Пётр" table:style-name="ks_td_agent">
            <text:p>Матвиенко Пётр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500GLS" table:style-name="ks_td_center">
            <text:p>C500GLS</text:p>
          </table:table-cell>
          <table:table-cell office:value-type="float" office:value="4.0" table:style-name="ks_td_center">
            <text:p>4,0</text:p>
          </table:table-cell>
          <table:table-cell office:value-type="float" office:value="1149.8" table:style-name="ks_td_num">
            <text:p>1149,8</text:p>
          </table:table-cell>
          <table:table-cell office:value-type="float" office:value="4599.2" table:formula="of:=D25*E25" table:style-name="ks_td_num">
            <text:p>4599,2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Матвиенко Пётр" table:style-name="ks_td_agent">
            <text:p>Матвиенко Пёт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150GLS" table:style-name="ks_td_center">
            <text:p>C150GLS</text:p>
          </table:table-cell>
          <table:table-cell office:value-type="float" office:value="3.0" table:style-name="ks_td_center">
            <text:p>3,0</text:p>
          </table:table-cell>
          <table:table-cell office:value-type="float" office:value="1547.5" table:style-name="ks_td_num">
            <text:p>1547,5</text:p>
          </table:table-cell>
          <table:table-cell office:value-type="float" office:value="4642.5" table:formula="of:=D26*E26" table:style-name="ks_td_num">
            <text:p>4642,5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100GLS" table:style-name="ks_td_center">
            <text:p>C100GLS</text:p>
          </table:table-cell>
          <table:table-cell office:value-type="float" office:value="9.0" table:style-name="ks_td_center">
            <text:p>9,0</text:p>
          </table:table-cell>
          <table:table-cell office:value-type="float" office:value="1074.7" table:style-name="ks_td_num">
            <text:p>1074,7</text:p>
          </table:table-cell>
          <table:table-cell office:value-type="float" office:value="9672.3" table:formula="of:=D27*E27" table:style-name="ks_td_num">
            <text:p>9672,3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5.0" table:style-name="ks_td_center">
            <text:p>5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16044.5" table:formula="of:=D28*E28" table:style-name="ks_td_num">
            <text:p>16044,5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6417.8" table:formula="of:=D29*E29" table:style-name="ks_td_num">
            <text:p>6417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Сергеев Максим" table:style-name="ks_td_agent">
            <text:p>Сергеев Максим</text:p>
          </table:table-cell>
          <table:table-cell office:value-type="float" office:value="195.0" table:style-name="ks_td_center">
            <text:p>195,0</text:p>
          </table:table-cell>
          <table:table-cell office:value-type="string" office:string-value="C150GLS" table:style-name="ks_td_center">
            <text:p>C150GLS</text:p>
          </table:table-cell>
          <table:table-cell office:value-type="float" office:value="3.0" table:style-name="ks_td_center">
            <text:p>3,0</text:p>
          </table:table-cell>
          <table:table-cell office:value-type="float" office:value="1547.5" table:style-name="ks_td_num">
            <text:p>1547,5</text:p>
          </table:table-cell>
          <table:table-cell office:value-type="float" office:value="4642.5" table:formula="of:=D30*E30" table:style-name="ks_td_num">
            <text:p>4642,5</text:p>
          </table:table-cell>
          <table:table-cell office:value-type="string" office:string-value="Ж/Д" table:style-name="ks_td_center">
            <text:p>Ж/Д</text:p>
          </table:table-cell>
        </table:table-row>
        <table:table-row>
          <table:table-cell office:value-type="string" office:string-value="Сергеев Максим" table:style-name="ks_td_agent">
            <text:p>Сергеев Максим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400GLS" table:style-name="ks_td_center">
            <text:p>C400GLS</text:p>
          </table:table-cell>
          <table:table-cell office:value-type="float" office:value="8.0" table:style-name="ks_td_center">
            <text:p>8,0</text:p>
          </table:table-cell>
          <table:table-cell office:value-type="float" office:value="5545.0" table:style-name="ks_td_num">
            <text:p>5545,0</text:p>
          </table:table-cell>
          <table:table-cell office:value-type="float" office:value="44360.0" table:formula="of:=D31*E31" table:style-name="ks_td_num">
            <text:p>44360,0</text:p>
          </table:table-cell>
          <table:table-cell office:value-type="string" office:string-value="АВИА" table:style-name="ks_td_center">
            <text:p>АВИА</text:p>
          </table:table-cell>
        </table:table-row>
        <table:table-row/>
        <table:table-row>
          <table:table-cell office:value-type="string" office:string-value="Филиал 261, цена единицы свыше 3000 руб. (задание 6)" table:number-columns-spanned="7" table:style-name="ks_block_title">
            <text:p>Филиал 261, цена единицы свыше 3000 руб. (задание 6)</text:p>
          </table:table-cell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  <table:covered-table-cell table:style-name="ks_covered"/>
        </table:table-row>
        <table:table-row>
          <table:table-cell office:value-type="string" office:string-value="Торговый агент" table:style-name="ks_hdr_gray">
            <text:p>Торговый агент</text:p>
          </table:table-cell>
          <table:table-cell office:value-type="string" office:string-value="Филиал" table:style-name="ks_hdr_gray">
            <text:p>Филиал</text:p>
          </table:table-cell>
          <table:table-cell office:value-type="string" office:string-value="Модель" table:style-name="ks_hdr_gray">
            <text:p>Модель</text:p>
          </table:table-cell>
          <table:table-cell office:value-type="string" office:string-value="Количество" table:style-name="ks_hdr_gray">
            <text:p>Количество</text:p>
          </table:table-cell>
          <table:table-cell office:value-type="string" office:string-value="Цена" table:style-name="ks_hdr_gray">
            <text:p>Цена</text:p>
          </table:table-cell>
          <table:table-cell office:value-type="string" office:string-value="Выручка" table:style-name="ks_hdr_gray">
            <text:p>Выручка</text:p>
          </table:table-cell>
          <table:table-cell office:value-type="string" office:string-value="Доставка" table:style-name="ks_hdr_gray">
            <text:p>Доставка</text:p>
          </table:table-cell>
        </table:table-row>
        <table:table-row>
          <table:table-cell office:value-type="string" office:string-value="Белкин Семён" table:style-name="ks_td_agent">
            <text:p>Белкин Семён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250GLS" table:style-name="ks_td_center">
            <text:p>C250GLS</text:p>
          </table:table-cell>
          <table:table-cell office:value-type="float" office:value="6.0" table:style-name="ks_td_center">
            <text:p>6,0</text:p>
          </table:table-cell>
          <table:table-cell office:value-type="float" office:value="4620.8" table:style-name="ks_td_num">
            <text:p>4620,8</text:p>
          </table:table-cell>
          <table:table-cell office:value-type="float" office:value="27724.8" table:formula="of:=D35*E35" table:style-name="ks_td_num">
            <text:p>27724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5.0" table:style-name="ks_td_center">
            <text:p>5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16044.5" table:formula="of:=D36*E36" table:style-name="ks_td_num">
            <text:p>16044,5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Милова Жанна" table:style-name="ks_td_agent">
            <text:p>Милова Жанна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2.0" table:style-name="ks_td_center">
            <text:p>2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6417.8" table:formula="of:=D37*E37" table:style-name="ks_td_num">
            <text:p>6417,8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Сергеев Максим" table:style-name="ks_td_agent">
            <text:p>Сергеев Максим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400GLS" table:style-name="ks_td_center">
            <text:p>C400GLS</text:p>
          </table:table-cell>
          <table:table-cell office:value-type="float" office:value="8.0" table:style-name="ks_td_center">
            <text:p>8,0</text:p>
          </table:table-cell>
          <table:table-cell office:value-type="float" office:value="5545.0" table:style-name="ks_td_num">
            <text:p>5545,0</text:p>
          </table:table-cell>
          <table:table-cell office:value-type="float" office:value="44360.0" table:formula="of:=D38*E38" table:style-name="ks_td_num">
            <text:p>44360,0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string" office:string-value="Гранкин Александр" table:style-name="ks_td_agent">
            <text:p>Гранкин Александр</text:p>
          </table:table-cell>
          <table:table-cell office:value-type="float" office:value="261.0" table:style-name="ks_td_center">
            <text:p>261,0</text:p>
          </table:table-cell>
          <table:table-cell office:value-type="string" office:string-value="C300GLS" table:style-name="ks_td_center">
            <text:p>C300GLS</text:p>
          </table:table-cell>
          <table:table-cell office:value-type="float" office:value="5.0" table:style-name="ks_td_center">
            <text:p>5,0</text:p>
          </table:table-cell>
          <table:table-cell office:value-type="float" office:value="3208.9" table:style-name="ks_td_num">
            <text:p>3208,9</text:p>
          </table:table-cell>
          <table:table-cell office:value-type="float" office:value="16044.5" table:formula="of:=D39*E39" table:style-name="ks_td_num">
            <text:p>16044,5</text:p>
          </table:table-cell>
          <table:table-cell office:value-type="string" office:string-value="Ж/Д" table:style-name="ks_td_center">
            <text:p>Ж/Д</text:p>
          </table:table-cell>
        </table:table-row>
        <table:table-row/>
        <table:table-row>
          <table:table-cell office:value-type="string" office:string-value="Критерии расширенного фильтра (задание 7)" table:number-columns-spanned="4" table:style-name="ks_block_title">
            <text:p>Критерии расширенного фильтра (задание 7)</text:p>
          </table:table-cell>
          <table:covered-table-cell table:style-name="ks_covered"/>
          <table:covered-table-cell table:style-name="ks_covered"/>
          <table:covered-table-cell table:style-name="ks_covered"/>
        </table:table-row>
        <table:table-row>
          <table:table-cell office:value-type="string" office:string-value="Филиал" table:style-name="ks_hdr_gray">
            <text:p>Филиал</text:p>
          </table:table-cell>
          <table:table-cell office:value-type="string" office:string-value="Выручка" table:style-name="ks_hdr_gray">
            <text:p>Выручка</text:p>
          </table:table-cell>
          <table:table-cell office:value-type="string" office:string-value="Выручка" table:style-name="ks_hdr_gray">
            <text:p>Выручка</text:p>
          </table:table-cell>
          <table:table-cell office:value-type="string" office:string-value="Доставка" table:style-name="ks_hdr_gray">
            <text:p>Доставка</text:p>
          </table:table-cell>
        </table:table-row>
        <table:table-row>
          <table:table-cell office:value-type="float" office:value="195" table:style-name="ks_td_center">
            <text:p>195</text:p>
          </table:table-cell>
          <table:table-cell office:value-type="string" office:string-value="&gt;1000" table:style-name="ks_td_center">
            <text:p>&gt;1000</text:p>
          </table:table-cell>
          <table:table-cell office:value-type="string" office:string-value="&lt;10000" table:style-name="ks_td_center">
            <text:p>&lt;10000</text:p>
          </table:table-cell>
          <table:table-cell office:value-type="string" office:string-value="АВИА" table:style-name="ks_td_center">
            <text:p>АВИА</text:p>
          </table:table-cell>
        </table:table-row>
        <table:table-row>
          <table:table-cell office:value-type="float" office:value="261" table:style-name="ks_td_center">
            <text:p>261</text:p>
          </table:table-cell>
          <table:table-cell office:value-type="string" office:string-value="&gt;10000" table:style-name="ks_td_center">
            <text:p>&gt;10000</text:p>
          </table:table-cell>
          <table:table-cell office:value-type="string" office:string-value="" table:style-name="ks_td_center">
            <text:p/>
          </table:table-cell>
          <table:table-cell office:value-type="string" office:string-value="Ж/Д" table:style-name="ks_td_center">
            <text:p>Ж/Д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