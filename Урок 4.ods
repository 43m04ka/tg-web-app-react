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automatic-styles/>
  <office:body>
    <office:spreadsheet>
      <table:table table:name="Ассортимент товаров"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Информация о товарах" table:number-columns-spanned="6">
            <text:p>Информация о товара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/>
        <table:table-row>
          <table:table-cell office:value-type="string" office:string-value="Студент (ФИО):">
            <text:p>Студент (ФИО):</text:p>
          </table:table-cell>
          <table:table-cell office:value-type="string" office:string-value="Иванов И.И.">
            <text:p>Иванов И.И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Дата:">
            <text:p>Дата:</text:p>
          </table:table-cell>
          <table:table-cell office:value-type="date" office:date-value="2026-05-11" table:formula="of:=TODAY()">
            <text:p>11.05.20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/>
        <table:table-row>
          <table:table-cell office:value-type="string" office:string-value="Товар">
            <text:p>Товар</text:p>
          </table:table-cell>
          <table:table-cell office:value-type="string" office:string-value="Название">
            <text:p>Название</text:p>
          </table:table-cell>
          <table:table-cell office:value-type="string" office:string-value="Цена">
            <text:p>Цена</text:p>
          </table:table-cell>
          <table:table-cell office:value-type="string" office:string-value="Стоимость">
            <text:p>Стоимость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Сумма">
            <text:p>Сумма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ерсональный">
            <text:p>Персональный</text:p>
          </table:table-cell>
          <table:table-cell office:value-type="float" office:value="2100.0">
            <text:p>2100,0</text:p>
          </table:table-cell>
          <table:table-cell office:value-type="float" office:value="2730.0" table:formula="of:=C7*1.3">
            <text:p>2730,0</text:p>
          </table:table-cell>
          <table:table-cell office:value-type="float" office:value="120.0">
            <text:p>120,0</text:p>
          </table:table-cell>
          <table:table-cell office:value-type="float" office:value="327600.0" table:formula="of:=D7*E7">
            <text:p>32760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Деловой">
            <text:p>Деловой</text:p>
          </table:table-cell>
          <table:table-cell office:value-type="float" office:value="1900.0">
            <text:p>1900,0</text:p>
          </table:table-cell>
          <table:table-cell office:value-type="float" office:value="2470.0" table:formula="of:=C8*1.3">
            <text:p>2470,0</text:p>
          </table:table-cell>
          <table:table-cell office:value-type="float" office:value="200.0">
            <text:p>200,0</text:p>
          </table:table-cell>
          <table:table-cell office:value-type="float" office:value="494000.0" table:formula="of:=D8*E8">
            <text:p>49400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рофессиональный">
            <text:p>Профессиональный</text:p>
          </table:table-cell>
          <table:table-cell office:value-type="float" office:value="4800.0">
            <text:p>4800,0</text:p>
          </table:table-cell>
          <table:table-cell office:value-type="float" office:value="6240.0" table:formula="of:=C9*1.3">
            <text:p>6240,0</text:p>
          </table:table-cell>
          <table:table-cell office:value-type="float" office:value="45.0">
            <text:p>45,0</text:p>
          </table:table-cell>
          <table:table-cell office:value-type="float" office:value="280800.0" table:formula="of:=D9*E9">
            <text:p>280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ерсональный">
            <text:p>Персональный</text:p>
          </table:table-cell>
          <table:table-cell office:value-type="float" office:value="3200.0">
            <text:p>3200,0</text:p>
          </table:table-cell>
          <table:table-cell office:value-type="float" office:value="4160.0" table:formula="of:=C10*1.3">
            <text:p>4160,0</text:p>
          </table:table-cell>
          <table:table-cell office:value-type="float" office:value="80.0">
            <text:p>80,0</text:p>
          </table:table-cell>
          <table:table-cell office:value-type="float" office:value="332800.0" table:formula="of:=D10*E10">
            <text:p>332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рофессиональный">
            <text:p>Профессиональный</text:p>
          </table:table-cell>
          <table:table-cell office:value-type="float" office:value="4100.0">
            <text:p>4100,0</text:p>
          </table:table-cell>
          <table:table-cell office:value-type="float" office:value="5330.0" table:formula="of:=C11*1.3">
            <text:p>5330,0</text:p>
          </table:table-cell>
          <table:table-cell office:value-type="float" office:value="60.0">
            <text:p>60,0</text:p>
          </table:table-cell>
          <table:table-cell office:value-type="float" office:value="319800.0" table:formula="of:=D11*E11">
            <text:p>319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Деловой">
            <text:p>Деловой</text:p>
          </table:table-cell>
          <table:table-cell office:value-type="float" office:value="2750.0">
            <text:p>2750,0</text:p>
          </table:table-cell>
          <table:table-cell office:value-type="float" office:value="3575.0" table:formula="of:=C12*1.3">
            <text:p>3575,0</text:p>
          </table:table-cell>
          <table:table-cell office:value-type="float" office:value="150.0">
            <text:p>150,0</text:p>
          </table:table-cell>
          <table:table-cell office:value-type="float" office:value="536250.0" table:formula="of:=D12*E12">
            <text:p>53625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рофессиональный Плюс">
            <text:p>Профессиональный Плюс</text:p>
          </table:table-cell>
          <table:table-cell office:value-type="float" office:value="5200.0">
            <text:p>5200,0</text:p>
          </table:table-cell>
          <table:table-cell office:value-type="float" office:value="6760.0" table:formula="of:=C13*1.3">
            <text:p>6760,0</text:p>
          </table:table-cell>
          <table:table-cell office:value-type="float" office:value="30.0">
            <text:p>30,0</text:p>
          </table:table-cell>
          <table:table-cell office:value-type="float" office:value="202800.0" table:formula="of:=D13*E13">
            <text:p>202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рофессиональный Плюс">
            <text:p>Профессиональный Плюс</text:p>
          </table:table-cell>
          <table:table-cell office:value-type="float" office:value="4550.0">
            <text:p>4550,0</text:p>
          </table:table-cell>
          <table:table-cell office:value-type="float" office:value="5915.0" table:formula="of:=C14*1.3">
            <text:p>5915,0</text:p>
          </table:table-cell>
          <table:table-cell office:value-type="float" office:value="25.0">
            <text:p>25,0</text:p>
          </table:table-cell>
          <table:table-cell office:value-type="float" office:value="147875.0" table:formula="of:=D14*E14">
            <text:p>147875,0</text:p>
          </table:table-cell>
        </table:table-row>
      </table:table>
      <table:table table:name="Ксероксы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Продажа копировальной техники. Отчёт" table:number-columns-spanned="7">
            <text:p>Продажа копировальной техники. Отчё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Филиал">
            <text:p>Филиал</text:p>
          </table:table-cell>
          <table:table-cell office:value-type="string" office:string-value="Модель">
            <text:p>Модель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">
            <text:p>Цена</text:p>
          </table:table-cell>
          <table:table-cell office:value-type="string" office:string-value="Выручка">
            <text:p>Выручка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Белкин Семён">
            <text:p>Белкин Семён</text:p>
          </table:table-cell>
          <table:table-cell office:value-type="float" office:value="261.0">
            <text:p>261,0</text:p>
          </table:table-cell>
          <table:table-cell office:value-type="string" office:string-value="C250GLS">
            <text:p>C250GLS</text:p>
          </table:table-cell>
          <table:table-cell office:value-type="float" office:value="6.0">
            <text:p>6,0</text:p>
          </table:table-cell>
          <table:table-cell office:value-type="float" office:value="4620.8">
            <text:p>4620,8</text:p>
          </table:table-cell>
          <table:table-cell office:value-type="float" office:value="27724.8" table:formula="of:=D3*E3">
            <text:p>27724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Белкин Семён">
            <text:p>Белкин Семён</text:p>
          </table:table-cell>
          <table:table-cell office:value-type="float" office:value="195.0">
            <text:p>195,0</text:p>
          </table:table-cell>
          <table:table-cell office:value-type="string" office:string-value="C100GLS">
            <text:p>C100GLS</text:p>
          </table:table-cell>
          <table:table-cell office:value-type="float" office:value="2.0">
            <text:p>2,0</text:p>
          </table:table-cell>
          <table:table-cell office:value-type="float" office:value="1289.6">
            <text:p>1289,6</text:p>
          </table:table-cell>
          <table:table-cell office:value-type="float" office:value="2579.2" table:formula="of:=D4*E4">
            <text:p>2579,2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5*E5">
            <text:p>16044,5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195.0">
            <text:p>195,0</text:p>
          </table:table-cell>
          <table:table-cell office:value-type="string" office:string-value="C100GLS">
            <text:p>C100GLS</text:p>
          </table:table-cell>
          <table:table-cell office:value-type="float" office:value="9.0">
            <text:p>9,0</text:p>
          </table:table-cell>
          <table:table-cell office:value-type="float" office:value="1074.7">
            <text:p>1074,7</text:p>
          </table:table-cell>
          <table:table-cell office:value-type="float" office:value="9672.3" table:formula="of:=D6*E6">
            <text:p>9672,3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2.0">
            <text:p>2,0</text:p>
          </table:table-cell>
          <table:table-cell office:value-type="float" office:value="3208.9">
            <text:p>3208,9</text:p>
          </table:table-cell>
          <table:table-cell office:value-type="float" office:value="6417.8" table:formula="of:=D7*E7">
            <text:p>6417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195.0">
            <text:p>195,0</text:p>
          </table:table-cell>
          <table:table-cell office:value-type="string" office:string-value="C500GLS">
            <text:p>C500GLS</text:p>
          </table:table-cell>
          <table:table-cell office:value-type="float" office:value="4.0">
            <text:p>4,0</text:p>
          </table:table-cell>
          <table:table-cell office:value-type="float" office:value="1149.8">
            <text:p>1149,8</text:p>
          </table:table-cell>
          <table:table-cell office:value-type="float" office:value="4599.2" table:formula="of:=D8*E8">
            <text:p>4599,2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261.0">
            <text:p>261,0</text:p>
          </table:table-cell>
          <table:table-cell office:value-type="string" office:string-value="C150GLS">
            <text:p>C150GLS</text:p>
          </table:table-cell>
          <table:table-cell office:value-type="float" office:value="3.0">
            <text:p>3,0</text:p>
          </table:table-cell>
          <table:table-cell office:value-type="float" office:value="1547.5">
            <text:p>1547,5</text:p>
          </table:table-cell>
          <table:table-cell office:value-type="float" office:value="4642.5" table:formula="of:=D9*E9">
            <text:p>4642,5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195.0">
            <text:p>195,0</text:p>
          </table:table-cell>
          <table:table-cell office:value-type="string" office:string-value="C250GLS">
            <text:p>C250GLS</text:p>
          </table:table-cell>
          <table:table-cell office:value-type="float" office:value="2.0">
            <text:p>2,0</text:p>
          </table:table-cell>
          <table:table-cell office:value-type="float" office:value="4620.8">
            <text:p>4620,8</text:p>
          </table:table-cell>
          <table:table-cell office:value-type="float" office:value="9241.6" table:formula="of:=D10*E10">
            <text:p>9241,6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Сергеев Максим">
            <text:p>Сергеев Максим</text:p>
          </table:table-cell>
          <table:table-cell office:value-type="float" office:value="261.0">
            <text:p>261,0</text:p>
          </table:table-cell>
          <table:table-cell office:value-type="string" office:string-value="C400GLS">
            <text:p>C400GLS</text:p>
          </table:table-cell>
          <table:table-cell office:value-type="float" office:value="8.0">
            <text:p>8,0</text:p>
          </table:table-cell>
          <table:table-cell office:value-type="float" office:value="5545.0">
            <text:p>5545,0</text:p>
          </table:table-cell>
          <table:table-cell office:value-type="float" office:value="44360.0" table:formula="of:=D11*E11">
            <text:p>4436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Сергеев Максим">
            <text:p>Сергеев Максим</text:p>
          </table:table-cell>
          <table:table-cell office:value-type="float" office:value="195.0">
            <text:p>195,0</text:p>
          </table:table-cell>
          <table:table-cell office:value-type="string" office:string-value="C150GLS">
            <text:p>C150GLS</text:p>
          </table:table-cell>
          <table:table-cell office:value-type="float" office:value="3.0">
            <text:p>3,0</text:p>
          </table:table-cell>
          <table:table-cell office:value-type="float" office:value="1547.5">
            <text:p>1547,5</text:p>
          </table:table-cell>
          <table:table-cell office:value-type="float" office:value="4642.5" table:formula="of:=D12*E12">
            <text:p>4642,5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261.0">
            <text:p>261,0</text:p>
          </table:table-cell>
          <table:table-cell office:value-type="string" office:string-value="C500GLS">
            <text:p>C500GLS</text:p>
          </table:table-cell>
          <table:table-cell office:value-type="float" office:value="1.0">
            <text:p>1,0</text:p>
          </table:table-cell>
          <table:table-cell office:value-type="float" office:value="1149.8">
            <text:p>1149,8</text:p>
          </table:table-cell>
          <table:table-cell office:value-type="float" office:value="1149.8" table:formula="of:=D13*E13">
            <text:p>1149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195.0">
            <text:p>195,0</text:p>
          </table:table-cell>
          <table:table-cell office:value-type="string" office:string-value="C200GLS">
            <text:p>C200GLS</text:p>
          </table:table-cell>
          <table:table-cell office:value-type="float" office:value="6.0">
            <text:p>6,0</text:p>
          </table:table-cell>
          <table:table-cell office:value-type="float" office:value="1547.5">
            <text:p>1547,5</text:p>
          </table:table-cell>
          <table:table-cell office:value-type="float" office:value="9285.0" table:formula="of:=D14*E14">
            <text:p>9285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15*E15">
            <text:p>16044,5</text:p>
          </table:table-cell>
          <table:table-cell office:value-type="string" office:string-value="Ж/Д">
            <text:p>Ж/Д</text:p>
          </table:table-cell>
        </table:table-row>
        <table:table-row/>
        <table:table-row>
          <table:table-cell office:value-type="string" office:string-value="Отсортированная таблица (задание 4: агент по алфавиту, филиал по возрастанию)" table:number-columns-spanned="7">
            <text:p>Отсортированная таблица (задание 4: агент по алфавиту, филиал по возрастанию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Филиал">
            <text:p>Филиал</text:p>
          </table:table-cell>
          <table:table-cell office:value-type="string" office:string-value="Модель">
            <text:p>Модель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">
            <text:p>Цена</text:p>
          </table:table-cell>
          <table:table-cell office:value-type="string" office:string-value="Выручка">
            <text:p>Выручка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Белкин Семён">
            <text:p>Белкин Семён</text:p>
          </table:table-cell>
          <table:table-cell office:value-type="float" office:value="195.0">
            <text:p>195,0</text:p>
          </table:table-cell>
          <table:table-cell office:value-type="string" office:string-value="C100GLS">
            <text:p>C100GLS</text:p>
          </table:table-cell>
          <table:table-cell office:value-type="float" office:value="2.0">
            <text:p>2,0</text:p>
          </table:table-cell>
          <table:table-cell office:value-type="float" office:value="1289.6">
            <text:p>1289,6</text:p>
          </table:table-cell>
          <table:table-cell office:value-type="float" office:value="2579.2" table:formula="of:=D19*E19">
            <text:p>2579,2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Белкин Семён">
            <text:p>Белкин Семён</text:p>
          </table:table-cell>
          <table:table-cell office:value-type="float" office:value="261.0">
            <text:p>261,0</text:p>
          </table:table-cell>
          <table:table-cell office:value-type="string" office:string-value="C250GLS">
            <text:p>C250GLS</text:p>
          </table:table-cell>
          <table:table-cell office:value-type="float" office:value="6.0">
            <text:p>6,0</text:p>
          </table:table-cell>
          <table:table-cell office:value-type="float" office:value="4620.8">
            <text:p>4620,8</text:p>
          </table:table-cell>
          <table:table-cell office:value-type="float" office:value="27724.8" table:formula="of:=D20*E20">
            <text:p>27724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195.0">
            <text:p>195,0</text:p>
          </table:table-cell>
          <table:table-cell office:value-type="string" office:string-value="C200GLS">
            <text:p>C200GLS</text:p>
          </table:table-cell>
          <table:table-cell office:value-type="float" office:value="6.0">
            <text:p>6,0</text:p>
          </table:table-cell>
          <table:table-cell office:value-type="float" office:value="1547.5">
            <text:p>1547,5</text:p>
          </table:table-cell>
          <table:table-cell office:value-type="float" office:value="9285.0" table:formula="of:=D21*E21">
            <text:p>9285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22*E22">
            <text:p>16044,5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261.0">
            <text:p>261,0</text:p>
          </table:table-cell>
          <table:table-cell office:value-type="string" office:string-value="C500GLS">
            <text:p>C500GLS</text:p>
          </table:table-cell>
          <table:table-cell office:value-type="float" office:value="1.0">
            <text:p>1,0</text:p>
          </table:table-cell>
          <table:table-cell office:value-type="float" office:value="1149.8">
            <text:p>1149,8</text:p>
          </table:table-cell>
          <table:table-cell office:value-type="float" office:value="1149.8" table:formula="of:=D23*E23">
            <text:p>1149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195.0">
            <text:p>195,0</text:p>
          </table:table-cell>
          <table:table-cell office:value-type="string" office:string-value="C250GLS">
            <text:p>C250GLS</text:p>
          </table:table-cell>
          <table:table-cell office:value-type="float" office:value="2.0">
            <text:p>2,0</text:p>
          </table:table-cell>
          <table:table-cell office:value-type="float" office:value="4620.8">
            <text:p>4620,8</text:p>
          </table:table-cell>
          <table:table-cell office:value-type="float" office:value="9241.6" table:formula="of:=D24*E24">
            <text:p>9241,6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195.0">
            <text:p>195,0</text:p>
          </table:table-cell>
          <table:table-cell office:value-type="string" office:string-value="C500GLS">
            <text:p>C500GLS</text:p>
          </table:table-cell>
          <table:table-cell office:value-type="float" office:value="4.0">
            <text:p>4,0</text:p>
          </table:table-cell>
          <table:table-cell office:value-type="float" office:value="1149.8">
            <text:p>1149,8</text:p>
          </table:table-cell>
          <table:table-cell office:value-type="float" office:value="4599.2" table:formula="of:=D25*E25">
            <text:p>4599,2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Матвиенко Пётр">
            <text:p>Матвиенко Пётр</text:p>
          </table:table-cell>
          <table:table-cell office:value-type="float" office:value="261.0">
            <text:p>261,0</text:p>
          </table:table-cell>
          <table:table-cell office:value-type="string" office:string-value="C150GLS">
            <text:p>C150GLS</text:p>
          </table:table-cell>
          <table:table-cell office:value-type="float" office:value="3.0">
            <text:p>3,0</text:p>
          </table:table-cell>
          <table:table-cell office:value-type="float" office:value="1547.5">
            <text:p>1547,5</text:p>
          </table:table-cell>
          <table:table-cell office:value-type="float" office:value="4642.5" table:formula="of:=D26*E26">
            <text:p>4642,5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195.0">
            <text:p>195,0</text:p>
          </table:table-cell>
          <table:table-cell office:value-type="string" office:string-value="C100GLS">
            <text:p>C100GLS</text:p>
          </table:table-cell>
          <table:table-cell office:value-type="float" office:value="9.0">
            <text:p>9,0</text:p>
          </table:table-cell>
          <table:table-cell office:value-type="float" office:value="1074.7">
            <text:p>1074,7</text:p>
          </table:table-cell>
          <table:table-cell office:value-type="float" office:value="9672.3" table:formula="of:=D27*E27">
            <text:p>9672,3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28*E28">
            <text:p>16044,5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2.0">
            <text:p>2,0</text:p>
          </table:table-cell>
          <table:table-cell office:value-type="float" office:value="3208.9">
            <text:p>3208,9</text:p>
          </table:table-cell>
          <table:table-cell office:value-type="float" office:value="6417.8" table:formula="of:=D29*E29">
            <text:p>6417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Сергеев Максим">
            <text:p>Сергеев Максим</text:p>
          </table:table-cell>
          <table:table-cell office:value-type="float" office:value="195.0">
            <text:p>195,0</text:p>
          </table:table-cell>
          <table:table-cell office:value-type="string" office:string-value="C150GLS">
            <text:p>C150GLS</text:p>
          </table:table-cell>
          <table:table-cell office:value-type="float" office:value="3.0">
            <text:p>3,0</text:p>
          </table:table-cell>
          <table:table-cell office:value-type="float" office:value="1547.5">
            <text:p>1547,5</text:p>
          </table:table-cell>
          <table:table-cell office:value-type="float" office:value="4642.5" table:formula="of:=D30*E30">
            <text:p>4642,5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Сергеев Максим">
            <text:p>Сергеев Максим</text:p>
          </table:table-cell>
          <table:table-cell office:value-type="float" office:value="261.0">
            <text:p>261,0</text:p>
          </table:table-cell>
          <table:table-cell office:value-type="string" office:string-value="C400GLS">
            <text:p>C400GLS</text:p>
          </table:table-cell>
          <table:table-cell office:value-type="float" office:value="8.0">
            <text:p>8,0</text:p>
          </table:table-cell>
          <table:table-cell office:value-type="float" office:value="5545.0">
            <text:p>5545,0</text:p>
          </table:table-cell>
          <table:table-cell office:value-type="float" office:value="44360.0" table:formula="of:=D31*E31">
            <text:p>44360,0</text:p>
          </table:table-cell>
          <table:table-cell office:value-type="string" office:string-value="АВИА">
            <text:p>АВИА</text:p>
          </table:table-cell>
        </table:table-row>
        <table:table-row/>
        <table:table-row>
          <table:table-cell office:value-type="string" office:string-value="Филиал 261, цена единицы свыше 3000 руб. (задание 6)" table:number-columns-spanned="7">
            <text:p>Филиал 261, цена единицы свыше 3000 руб. (задание 6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Филиал">
            <text:p>Филиал</text:p>
          </table:table-cell>
          <table:table-cell office:value-type="string" office:string-value="Модель">
            <text:p>Модель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">
            <text:p>Цена</text:p>
          </table:table-cell>
          <table:table-cell office:value-type="string" office:string-value="Выручка">
            <text:p>Выручка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Белкин Семён">
            <text:p>Белкин Семён</text:p>
          </table:table-cell>
          <table:table-cell office:value-type="float" office:value="261.0">
            <text:p>261,0</text:p>
          </table:table-cell>
          <table:table-cell office:value-type="string" office:string-value="C250GLS">
            <text:p>C250GLS</text:p>
          </table:table-cell>
          <table:table-cell office:value-type="float" office:value="6.0">
            <text:p>6,0</text:p>
          </table:table-cell>
          <table:table-cell office:value-type="float" office:value="4620.8">
            <text:p>4620,8</text:p>
          </table:table-cell>
          <table:table-cell office:value-type="float" office:value="27724.8" table:formula="of:=D35*E35">
            <text:p>27724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36*E36">
            <text:p>16044,5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Милова Жанна">
            <text:p>Милова Жанна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2.0">
            <text:p>2,0</text:p>
          </table:table-cell>
          <table:table-cell office:value-type="float" office:value="3208.9">
            <text:p>3208,9</text:p>
          </table:table-cell>
          <table:table-cell office:value-type="float" office:value="6417.8" table:formula="of:=D37*E37">
            <text:p>6417,8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Сергеев Максим">
            <text:p>Сергеев Максим</text:p>
          </table:table-cell>
          <table:table-cell office:value-type="float" office:value="261.0">
            <text:p>261,0</text:p>
          </table:table-cell>
          <table:table-cell office:value-type="string" office:string-value="C400GLS">
            <text:p>C400GLS</text:p>
          </table:table-cell>
          <table:table-cell office:value-type="float" office:value="8.0">
            <text:p>8,0</text:p>
          </table:table-cell>
          <table:table-cell office:value-type="float" office:value="5545.0">
            <text:p>5545,0</text:p>
          </table:table-cell>
          <table:table-cell office:value-type="float" office:value="44360.0" table:formula="of:=D38*E38">
            <text:p>4436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Гранкин Александр">
            <text:p>Гранкин Александр</text:p>
          </table:table-cell>
          <table:table-cell office:value-type="float" office:value="261.0">
            <text:p>261,0</text:p>
          </table:table-cell>
          <table:table-cell office:value-type="string" office:string-value="C300GLS">
            <text:p>C300GLS</text:p>
          </table:table-cell>
          <table:table-cell office:value-type="float" office:value="5.0">
            <text:p>5,0</text:p>
          </table:table-cell>
          <table:table-cell office:value-type="float" office:value="3208.9">
            <text:p>3208,9</text:p>
          </table:table-cell>
          <table:table-cell office:value-type="float" office:value="16044.5" table:formula="of:=D39*E39">
            <text:p>16044,5</text:p>
          </table:table-cell>
          <table:table-cell office:value-type="string" office:string-value="Ж/Д">
            <text:p>Ж/Д</text:p>
          </table:table-cell>
        </table:table-row>
        <table:table-row/>
        <table:table-row>
          <table:table-cell office:value-type="string" office:string-value="Критерии расширенного фильтра (задание 7)" table:number-columns-spanned="4">
            <text:p>Критерии расширенного фильтра (задание 7)</text:p>
          </table:table-cell>
          <table:covered-table-cell/>
          <table:covered-table-cell/>
          <table:covered-table-cell/>
        </table:table-row>
        <table:table-row>
          <table:table-cell office:value-type="string" office:string-value="Филиал">
            <text:p>Филиал</text:p>
          </table:table-cell>
          <table:table-cell office:value-type="string" office:string-value="Выручка">
            <text:p>Выручка</text:p>
          </table:table-cell>
          <table:table-cell office:value-type="string" office:string-value="Выручка">
            <text:p>Выручка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string-value="&gt;1000">
            <text:p>&gt;1000</text:p>
          </table:table-cell>
          <table:table-cell office:value-type="string" office:string-value="&lt;10000">
            <text:p>&lt;1000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string-value="&gt;10000">
            <text:p>&gt;10000</text:p>
          </table:table-cell>
          <table:table-cell office:value-type="string" office:string-value="">
            <text:p/>
          </table:table-cell>
          <table:table-cell office:value-type="string" office:string-value="Ж/Д">
            <text:p>Ж/Д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